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XO Thames" svg:font-family="XO Thame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PT Astra Serif" svg:font-family="PT Astra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margin-bottom="0in" fo:line-height="150%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 fo:margin-bottom="0in" fo:line-height="150%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 fo:margin-bottom="0in" fo:line-height="150%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5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in" fo:line-height="15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margin-bottom="0in" fo:line-height="15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justify" fo:margin-bottom="0in" fo:line-height="150%" fo:margin-left="2.4583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 fo:margin-bottom="0in" fo:line-height="15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 fo:margin-bottom="0in"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end" fo:margin-bottom="0in" fo:line-height="15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 fo:margin-bottom="0in" fo:line-height="150%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 fo:margin-bottom="0in" fo:line-height="150%" fo:margin-left="1.9666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end" fo:margin-bottom="0in" fo:line-height="15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 fo:margin-bottom="0in" fo:line-height="15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margin-bottom="0in" fo:line-height="150%" fo:text-indent="0.4923in"/>
    </style:style>
    <style:style style:name="T50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paragraph-properties fo:text-align="justify" fo:margin-bottom="0in" fo:line-height="150%" fo:text-indent="0.4923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margin-bottom="0in" fo:line-height="150%" fo:text-indent="0.4923in"/>
    </style:style>
    <style:style style:name="T55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paragraph-properties fo:text-align="justify" fo:margin-bottom="0in" fo:line-height="150%" fo:text-indent="0.4923i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margin-bottom="0in" fo:line-height="150%" fo:text-indent="0.4923i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margin-bottom="0in" fo:line-height="150%" fo:text-indent="0.4923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margin-bottom="0in" fo:line-height="150%" fo:text-indent="0.4923in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margin-bottom="0in" fo:line-height="150%" fo:text-indent="0.4923in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margin-bottom="0in" fo:line-height="150%" fo:text-indent="0.4923in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margin-bottom="0in" fo:line-height="150%" fo:text-indent="0.4923in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margin-bottom="0in" fo:line-height="150%" fo:text-indent="0.4923in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justify" fo:margin-bottom="0in" fo:line-height="150%" fo:text-indent="0.4923in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margin-bottom="0in" fo:line-height="150%" fo:text-indent="0.4923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margin-bottom="0in" fo:line-height="150%" fo:text-indent="0.4923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margin-bottom="0in" fo:line-height="150%" fo:text-indent="0.4923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margin-bottom="0in" fo:line-height="150%" fo:text-indent="0.4923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margin-bottom="0in" fo:line-height="150%" fo:text-indent="0.4923i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margin-bottom="0in" fo:line-height="150%" fo:text-indent="0.4923in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margin-bottom="0in" fo:line-height="150%" fo:text-indent="0.4923in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margin-bottom="0in" fo:line-height="150%" fo:text-indent="0.4923in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margin-bottom="0in" fo:line-height="150%" fo:text-indent="0.4923in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margin-bottom="0in" fo:line-height="150%" fo:text-indent="0.4923i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margin-bottom="0in" fo:line-height="150%" fo:text-indent="0.4923in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margin-bottom="0in" fo:line-height="150%" fo:text-indent="0.4923in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margin-bottom="0in" fo:line-height="150%" fo:text-indent="0.4923i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margin-bottom="0in" fo:line-height="150%" fo:text-indent="0.4923i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margin-bottom="0in" fo:line-height="150%" fo:text-indent="0.4923in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text-align="justify" fo:margin-bottom="0in" fo:line-height="150%" fo:text-indent="0.4923in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text-align="justify" fo:margin-bottom="0in" fo:line-height="150%" fo:text-indent="0.4923in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margin-bottom="0in" fo:line-height="150%" fo:text-indent="0.4923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 fo:margin-bottom="0in" fo:line-height="150%" fo:text-indent="0.4923i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margin-bottom="0in" fo:line-height="150%" fo:text-indent="0.4923in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justify" fo:margin-bottom="0in" fo:line-height="150%" fo:text-indent="0.4923i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margin-bottom="0in" fo:line-height="150%" fo:text-indent="0.4923in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margin-bottom="0in" fo:line-height="150%" fo:text-indent="0.4923i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margin-bottom="0in" fo:line-height="150%" fo:text-indent="0.4923in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margin-bottom="0in" fo:line-height="150%" fo:text-indent="0.4923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margin-bottom="0in" fo:line-height="150%" fo:text-indent="0.4923in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margin-bottom="0in" fo:line-height="150%" fo:text-indent="0.4923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margin-bottom="0in" fo:line-height="150%" fo:text-indent="0.4923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margin-bottom="0in" fo:line-height="150%" fo:text-indent="0.4923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margin-bottom="0in" fo:line-height="150%" fo:text-indent="0.4923in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margin-bottom="0in" fo:line-height="150%" fo:text-indent="0.4923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margin-bottom="0in" fo:line-height="150%" fo:text-indent="0.4923in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text-align="justify" fo:margin-bottom="0in" fo:line-height="150%" fo:text-indent="0.4923in"/>
    </style:style>
    <style:style style:name="T148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paragraph-properties fo:text-align="justify" fo:margin-bottom="0in" fo:line-height="150%" fo:text-indent="0.4923in"/>
    </style:style>
    <style:style style:name="T150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51" style:parent-style-name="Standard" style:family="paragraph">
      <style:paragraph-properties fo:text-align="justify" fo:margin-bottom="0in" fo:line-height="150%" fo:text-indent="0.4923in"/>
    </style:style>
    <style:style style:name="T152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53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54" style:parent-style-name="Standard" style:family="paragraph">
      <style:paragraph-properties fo:text-align="center" fo:margin-bottom="0in" fo:line-height="150%" fo:text-indent="0.4923in"/>
    </style:style>
    <style:style style:name="P155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56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57" style:parent-style-name="Абзацсписка" style:family="paragraph">
      <style:paragraph-properties fo:text-align="justify" fo:margin-bottom="0in" fo:line-height="100%" fo:margin-left="0in" fo:text-indent="0.5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160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61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62" style:parent-style-name="Абзацсписка" style:family="paragraph">
      <style:paragraph-properties fo:text-align="justify" fo:margin-bottom="0in" fo:line-height="100%" fo:margin-left="0in" fo:text-indent="0.5in">
        <style:tab-stops/>
      </style:paragraph-properties>
    </style:style>
    <style:style style:name="T163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64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65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166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67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68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16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70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71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172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73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74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7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/>
    </style:style>
    <style:style style:name="P176" style:parent-style-name="Абзацсписка" style:family="paragraph">
      <style:paragraph-properties fo:text-align="justify" fo:margin-bottom="0in" fo:line-height="100%" fo:margin-left="0in" fo:text-indent="0.5in">
        <style:tab-stops/>
      </style:paragraph-properties>
    </style:style>
    <style:style style:name="T177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78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17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80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81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8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PT Astra Serif" style:font-name-asian="PT Astra Serif" style:font-name-complex="PT Astra Serif" fo:font-size="14pt" style:font-size-asian="14pt" style:font-size-complex="14pt"/>
    </style:style>
    <style:style style:name="P183" style:parent-style-name="Standard" style:family="paragraph">
      <style:paragraph-properties fo:text-align="center" fo:margin-bottom="0in" fo:line-height="150%" fo:text-indent="0.4923in"/>
    </style:style>
    <style:style style:name="P184" style:parent-style-name="Standard" style:family="paragraph">
      <style:paragraph-properties fo:text-align="center" fo:margin-bottom="0in" fo:line-height="150%" fo:text-indent="0.4923in"/>
    </style:style>
    <style:style style:name="T185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86" style:parent-style-name="Standard" style:family="paragraph">
      <style:paragraph-properties fo:text-align="center" fo:margin-bottom="0in" fo:line-height="150%" fo:text-indent="0.4923in"/>
    </style:style>
    <style:style style:name="P187" style:parent-style-name="Standard" style:family="paragraph">
      <style:paragraph-properties fo:text-align="center" fo:margin-bottom="0in" fo:line-height="150%" fo:text-indent="0.4923in"/>
    </style:style>
    <style:style style:name="T188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89" style:parent-style-name="Standard" style:family="paragraph">
      <style:paragraph-properties fo:text-align="justify" fo:margin-bottom="0in" fo:line-height="150%" fo:text-indent="0.4923in"/>
    </style:style>
    <style:style style:name="T190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191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92" style:parent-style-name="Standard" style:family="paragraph">
      <style:paragraph-properties fo:text-align="center" fo:margin-bottom="0in" fo:line-height="150%" fo:text-indent="0.4923in"/>
    </style:style>
    <style:style style:name="P193" style:parent-style-name="Standard" style:family="paragraph">
      <style:paragraph-properties fo:text-align="center" fo:margin-bottom="0in" fo:line-height="150%" fo:text-indent="0.4923in"/>
    </style:style>
    <style:style style:name="T194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195" style:parent-style-name="Standard" style:family="paragraph">
      <style:paragraph-properties fo:text-align="justify" fo:margin-bottom="0in" fo:line-height="150%" fo:text-indent="0.4923in"/>
    </style:style>
    <style:style style:name="T196" style:parent-style-name="Основнойшрифтабзаца" style:family="text">
      <style:text-properties style:font-name="PT Astra Serif" style:font-name-asian="PT Astra Serif" style:font-name-complex="PT Astra Serif" fo:font-size="16pt" style:font-size-asian="16pt" style:font-size-complex="16pt"/>
    </style:style>
    <style:style style:name="T197" style:parent-style-name="Основнойшрифтабзаца" style:family="text">
      <style:text-properties style:font-name="PT Astra Serif" style:font-name-asian="PT Astra Serif" style:font-name-complex="PT Astra Serif" fo:font-size="16pt" style:font-size-asian="16pt" style:font-size-complex="16pt"/>
    </style:style>
    <style:style style:name="T198" style:parent-style-name="Основнойшрифтабзаца" style:family="text">
      <style:text-properties style:font-name="PT Astra Serif" style:font-name-asian="PT Astra Serif" style:font-name-complex="PT Astra Serif" fo:font-weight="bold" style:font-weight-asian="bold" style:font-weight-complex="bold" fo:font-size="16pt" style:font-size-asian="16pt" style:font-size-complex="16pt"/>
    </style:style>
    <style:style style:name="T199" style:parent-style-name="Основнойшрифтабзаца" style:family="text">
      <style:text-properties style:font-name="PT Astra Serif" style:font-name-asian="PT Astra Serif" style:font-name-complex="PT Astra Serif" fo:font-size="16pt" style:font-size-asian="16pt" style:font-size-complex="16pt"/>
    </style:style>
    <style:style style:name="T200" style:parent-style-name="Основнойшрифтабзаца" style:family="text">
      <style:text-properties style:font-name="PT Astra Serif" style:font-name-asian="PT Astra Serif" style:font-name-complex="PT Astra Serif" fo:font-size="16pt" style:font-size-asian="16pt" style:font-size-complex="16pt"/>
    </style:style>
    <style:style style:name="P201" style:parent-style-name="Standard" style:family="paragraph">
      <style:paragraph-properties fo:margin-bottom="0in" fo:line-height="150%" fo:text-indent="0.4923in"/>
      <style:text-properties style:font-name="Arial" style:font-name-asian="Arial" style:font-name-complex="Arial" fo:font-size="16pt" style:font-size-asian="16pt" style:font-size-complex="16pt"/>
    </style:style>
    <style:style style:name="P202" style:parent-style-name="Standard" style:family="paragraph">
      <style:paragraph-properties fo:margin-bottom="0in" fo:line-height="150%" fo:text-indent="0.4923in"/>
    </style:style>
    <style:style style:name="P203" style:parent-style-name="Standard" style:family="paragraph">
      <style:paragraph-properties fo:text-align="center" fo:margin-bottom="0in" fo:line-height="150%" fo:text-indent="0.4923in"/>
    </style:style>
    <style:style style:name="T204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05" style:parent-style-name="Standard" style:family="paragraph">
      <style:paragraph-properties fo:text-align="center" fo:margin-bottom="0in" fo:line-height="150%" fo:text-indent="0.4923in"/>
    </style:style>
    <style:style style:name="P206" style:parent-style-name="Standard" style:family="paragraph">
      <style:paragraph-properties fo:text-align="center" fo:margin-bottom="0in" fo:line-height="150%" fo:text-indent="0.4923in"/>
    </style:style>
    <style:style style:name="T207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08" style:parent-style-name="Standard" style:family="paragraph">
      <style:paragraph-properties fo:text-align="center" fo:margin-bottom="0in" fo:line-height="150%" fo:text-indent="0.4923in"/>
    </style:style>
    <style:style style:name="P209" style:parent-style-name="Standard" style:family="paragraph">
      <style:paragraph-properties fo:text-align="center" fo:margin-bottom="0in" fo:line-height="150%" fo:text-indent="0.4923in"/>
    </style:style>
    <style:style style:name="T210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11" style:parent-style-name="Standard" style:family="paragraph">
      <style:paragraph-properties fo:text-align="justify" fo:margin-bottom="0in" fo:line-height="150%" fo:text-indent="0.4923in"/>
    </style:style>
    <style:style style:name="T212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213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14" style:parent-style-name="Standard" style:family="paragraph">
      <style:paragraph-properties fo:text-align="center" fo:margin-bottom="0in" fo:line-height="150%" fo:text-indent="0.4923in"/>
    </style:style>
    <style:style style:name="P215" style:parent-style-name="Standard" style:family="paragraph">
      <style:paragraph-properties fo:text-align="center" fo:margin-bottom="0in" fo:line-height="150%" fo:text-indent="0.4923in"/>
    </style:style>
    <style:style style:name="T216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17" style:parent-style-name="Standard" style:family="paragraph">
      <style:paragraph-properties fo:text-align="justify" fo:margin-bottom="0in" fo:line-height="150%" fo:text-indent="0.4923in"/>
    </style:style>
    <style:style style:name="T218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219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20" style:parent-style-name="Standard" style:family="paragraph">
      <style:paragraph-properties fo:text-align="center" fo:margin-bottom="0in" fo:line-height="150%" fo:text-indent="0.4923in"/>
    </style:style>
    <style:style style:name="P221" style:parent-style-name="Standard" style:family="paragraph">
      <style:paragraph-properties fo:text-align="center" fo:margin-bottom="0in" fo:line-height="150%" fo:text-indent="0.4923in"/>
    </style:style>
    <style:style style:name="T222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23" style:parent-style-name="Standard" style:family="paragraph">
      <style:paragraph-properties fo:text-align="justify" fo:margin-bottom="0in" fo:line-height="150%" fo:text-indent="0.4923in"/>
    </style:style>
    <style:style style:name="T224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225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26" style:parent-style-name="Standard" style:family="paragraph">
      <style:paragraph-properties fo:text-align="center" fo:margin-bottom="0in" fo:line-height="150%" fo:text-indent="0.4923in"/>
    </style:style>
    <style:style style:name="P227" style:parent-style-name="Standard" style:family="paragraph">
      <style:paragraph-properties fo:text-align="center" fo:margin-bottom="0in" fo:line-height="150%" fo:text-indent="0.4923in"/>
    </style:style>
    <style:style style:name="T228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P229" style:parent-style-name="Standard" style:family="paragraph">
      <style:paragraph-properties fo:margin-bottom="0in" fo:line-height="150%" fo:text-indent="0.4923in"/>
    </style:style>
    <style:style style:name="T230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paragraph-properties fo:text-align="justify" fo:margin-bottom="0in" fo:line-height="150%" fo:text-indent="0.4923in"/>
    </style:style>
    <style:style style:name="T232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name="T233" style:parent-style-name="Основнойшрифтабзаца" style:family="text">
      <style:text-properties style:font-name="PT Astra Serif" style:font-name-asian="PT Astra Serif" style:font-name-complex="PT Astra Serif" fo:font-size="14pt" style:font-size-asian="14pt" style:font-size-complex="14pt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3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14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1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3">Министерство науки и высшего образования Российской Федерации</text:span></text:p>
      <text:p text:style-name="P4"><text:span text:style-name="T5">Пензенский государственный университет</text:span></text:p>
      <text:p text:style-name="P6"><text:span text:style-name="T7">Кафедра «Математическое обеспечение и применение ЭВМ»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курсу «Операционные системы»</text:span></text:p>
      <text:p text:style-name="P20"><text:span text:style-name="T21">на тему «Команды Shell</text:span></text:p>
      <text:p text:style-name="P22"><text:span text:style-name="T23">операционной системы Linux»</text:span></text:p>
      <text:p text:style-name="P24"/>
      <text:p text:style-name="P25"/>
      <text:p text:style-name="P26"/>
      <text:p text:style-name="P27"/>
      <text:p text:style-name="P28"/>
      <text:p text:style-name="P29"><text:tab/><text:tab/><text:tab/><text:span text:style-name="T30">Выполнили:</text:span></text:p>
      <text:p text:style-name="P31"><text:span text:style-name="T32">Студенты группы 23ВП2</text:span></text:p>
      <text:p text:style-name="P33"><text:span text:style-name="T34">Осин С.М.</text:span></text:p>
      <text:p text:style-name="P35"><text:span text:style-name="T36">Петровский В.П.</text:span></text:p>
      <text:p text:style-name="P37"><text:span text:style-name="T38">Ермаков С.Е.</text:span></text:p>
      <text:p text:style-name="P39"><text:tab/><text:tab/><text:tab/><text:tab/><text:span text:style-name="T40">Принял:</text:span></text:p>
      <text:p text:style-name="P41"><text:span text:style-name="T42">к.т.н. Шашков Б.Д.</text:span></text:p>
      <text:p text:style-name="P43"/>
      <text:p text:style-name="P44"/>
      <text:p text:style-name="P45"/>
      <text:p text:style-name="P46"/>
      <text:p text:style-name="P47"><text:span text:style-name="T48">Пенза 2025</text:span></text:p>
      <text:p text:style-name="P49"><text:span text:style-name="T50">Цель работы</text:span></text:p>
      <text:p text:style-name="P51"><text:span text:style-name="T52">Изучить особенности формирования и выполнения некоторых команд оболочки Bourn shell<text:s/></text:span><text:span text:style-name="T53">операционной системы Linux Ubuntu.</text:span></text:p>
      <text:p text:style-name="P54"><text:span text:style-name="T55">Лабораторное задание</text:span></text:p>
      <text:p text:style-name="P56"><text:span text:style-name="T57">1. Командой echo -n &gt; имя файла создать файл. С помощью команд</text:span></text:p>
      <text:p text:style-name="P58"><text:span text:style-name="T59">cat и ls просмотреть его содержимое и длину.</text:span></text:p>
      <text:p text:style-name="P60"><text:span text:style-name="T61">2. Задействовав ряд ключей команды ls, получить результат. Объяснить</text:span></text:p>
      <text:p text:style-name="P62"><text:span text:style-name="T63">значение каждого поля.</text:span></text:p>
      <text:p text:style-name="P64"><text:span text:style-name="T65">3. Открыть файл в текстовом редакторе. Набрать несколько осмысленных</text:span></text:p>
      <text:p text:style-name="P66"><text:span text:style-name="T67">строк. Завершить работу с редактором.</text:span></text:p>
      <text:p text:style-name="P68"><text:span text:style-name="T69">4. Просмотреть содержимое файла, используя команду cat. Повторно</text:span></text:p>
      <text:p text:style-name="P70"><text:span text:style-name="T71">войти в редактор и изменить файл таким образом, чтобы количество</text:span></text:p>
      <text:p text:style-name="P72"><text:span text:style-name="T73">строк в нем превыша</text:span><text:span text:style-name="T74">ло 25 (число строк на экране). Вновь вывести файл</text:span></text:p>
      <text:p text:style-name="P75"><text:span text:style-name="T76">на экран. Объяснить полученные результаты.</text:span></text:p>
      <text:p text:style-name="P77"><text:span text:style-name="T78">5. Используя команду more, добиться поэкранного вывода файла.</text:span></text:p>
      <text:p text:style-name="P79"><text:span text:style-name="T80">Объяснить полученные результаты.</text:span></text:p>
      <text:p text:style-name="P81"><text:span text:style-name="T82">6. Командой mkdir &lt;имя каталога&gt; создать каталог. Скопировать</text:span></text:p>
      <text:p text:style-name="P83"><text:span text:style-name="T84">туда с</text:span><text:span text:style-name="T85">озданный файл.</text:span></text:p>
      <text:p text:style-name="P86"><text:span text:style-name="T87">7. Попытаться произвести повторное копирование. Объяснить</text:span></text:p>
      <text:p text:style-name="P88"><text:span text:style-name="T89">полученные результаты. Используя опции команды cp, добиться</text:span></text:p>
      <text:p text:style-name="P90"><text:span text:style-name="T91">результата.</text:span></text:p>
      <text:p text:style-name="P92"><text:span text:style-name="T93">8. Скопировать в каталог тот же файл, указав в качестве приемника имя,</text:span></text:p>
      <text:p text:style-name="P94"><text:span text:style-name="T95">отличающееся от старого лишь<text:s/></text:span><text:span text:style-name="T96">последним символом. Повторить</text:span></text:p>
      <text:p text:style-name="P97"><text:span text:style-name="T98">операцию 4 раза.</text:span></text:p>
      <text:p text:style-name="P99"><text:span text:style-name="T100">9. Командой cd &lt;имя каталога&gt; перейти в созданный каталог.</text:span></text:p>
      <text:p text:style-name="P101"><text:span text:style-name="T102">Скопировать в домашний каталог 4 файла, используя разные виды</text:span></text:p>
      <text:p text:style-name="P103"><text:span text:style-name="T104">масок (*, ?, []). Необходимо каждый раз просматривать</text:span></text:p>
      <text:soft-page-break/>
      <text:p text:style-name="P105"><text:span text:style-name="T106">содержимое каталога командой ls -l</text:span><text:span text:style-name="T107">. После каждого копирования</text:span></text:p>
      <text:p text:style-name="P108"><text:span text:style-name="T109">удалять файлы в каталоге - адресате командой rm, используя</text:span></text:p>
      <text:p text:style-name="P110"><text:span text:style-name="T111">необходимые ключи.</text:span></text:p>
      <text:p text:style-name="P112"><text:span text:style-name="T113">10. Удалить все созданные файлы, используя команду</text:span></text:p>
      <text:p text:style-name="P114"><text:span text:style-name="T115">rm &lt;имя файла&gt;. Во избежание удаления файлов, созданных</text:span></text:p>
      <text:p text:style-name="P116"><text:span text:style-name="T117">другой бригадой, при выполнении этого пункт</text:span><text:span text:style-name="T118">а задания, запрещается</text:span></text:p>
      <text:p text:style-name="P119"><text:span text:style-name="T120">пользоваться маской "*".</text:span></text:p>
      <text:p text:style-name="P121"><text:span text:style-name="T122">11. Создать в рабочем каталоге подкаталог.</text:span></text:p>
      <text:p text:style-name="P123"><text:span text:style-name="T124">12. В соответствии с лабораторным заданием создать пример текстового</text:span></text:p>
      <text:p text:style-name="P125"><text:span text:style-name="T126">файла. Файл должен содержать несколько строк информации.</text:span></text:p>
      <text:p text:style-name="P127"><text:span text:style-name="T128">13. В соответствии с 4 вариантом задани</text:span><text:span text:style-name="T129">я создать файл с содержимым</text:span></text:p>
      <text:p text:style-name="P130"><text:span text:style-name="T131">каталога. Просмотреть полученный файл. Вывести все элементы каталога<text:s/></text:span><text:tab/><text:span text:style-name="T132">без исключения командой cat. Командой grep придумать фильтр.</text:span></text:p>
      <text:p text:style-name="P133"><text:span text:style-name="T134">14. Используя программный канал, обработать результаты выполнения</text:span></text:p>
      <text:p text:style-name="P135"><text:span text:style-name="T136">заданной команды соответствующи</text:span><text:span text:style-name="T137">м фильтром. Результат сохранить в</text:span></text:p>
      <text:p text:style-name="P138"><text:span text:style-name="T139">файле. команда who выводит список работающих в текущий момент</text:span></text:p>
      <text:p text:style-name="P140"><text:span text:style-name="T141">пользователей, команда head выводит первые строки файла. По</text:span></text:p>
      <text:p text:style-name="P142"><text:span text:style-name="T143">умолчанию выводятся 10 первых строк. Это значение можно изменить,</text:span></text:p>
      <text:p text:style-name="P144"><text:span text:style-name="T145">используя ключ вида -&lt;число строк&gt;</text:span><text:span text:style-name="T146">.</text:span></text:p>
      <text:p text:style-name="P147"><text:span text:style-name="T148">Ход работы</text:span></text:p>
      <text:p text:style-name="P149"><text:span text:style-name="T150">Открыли терминал Linux Ubuntu комбинацией ctrl+alt+t.</text:span></text:p>
      <text:p text:style-name="P151"><text:span text:style-name="T152">Создали пустой файл командой echo privet, mir! &gt; lab3. Затем командами cat вывели содержимое файла и ls -l длину файла в байтах ( 13 в данном случае). Результат представлен на<text:s/></text:span><text:span text:style-name="T153">рисунке 1.</text:span></text:p>
      <text:p text:style-name="P154"><draw:frame draw:style-name="a0" draw:name="Рисунок 1" text:anchor-type="as-char" svg:x="0in" svg:y="0in" svg:width="5.1354in" svg:height="3.3126in" style:rel-width="scale" style:rel-height="scale"><draw:image xlink:href="media/image1.png" xlink:type="simple" xlink:show="embed" xlink:actuate="onLoad"/><svg:title/><svg:desc/></draw:frame></text:p>
      <text:p text:style-name="P155"><text:span text:style-name="T156">Рисунок 1 — Создание файла lab3.</text:span></text:p>
      <text:p text:style-name="P157"><text:span text:style-name="T158">Задействовали ряд ключей ls: -b — для имени файла, -i — для вывода inode, -g — аналогично -l , но отображение имени владельца. Результат представлен на рисунке 2.</text:span></text:p>
      <text:p text:style-name="P159"><draw:frame draw:style-name="a1" draw:name="Рисунок 2" text:anchor-type="as-char" svg:x="0in" svg:y="0in" svg:width="5.0626in" svg:height="2.3957in" style:rel-width="scale" style:rel-height="scale"><draw:image xlink:href="media/image2.png" xlink:type="simple" xlink:show="embed" xlink:actuate="onLoad"/><svg:title/><svg:desc/></draw:frame></text:p>
      <text:p text:style-name="P160"><text:span text:style-name="T161">Рисунок 2 — Ключи ls.</text:span></text:p>
      <text:p text:style-name="P162"><text:span text:style-name="T163">Текстовым редактором ge</text:span><text:span text:style-name="T164">dit открыли содержимое файла lab3. Написали несколько строк и закрыли. Проверили содержимое файла командой cat. Результат представлен на рисунках 3-5.</text:span></text:p>
      <text:p text:style-name="P165"><draw:frame draw:style-name="a2" draw:name="Рисунок 3" text:anchor-type="as-char" svg:x="0in" svg:y="0in" svg:width="5.125in" svg:height="2.78125in" style:rel-width="scale" style:rel-height="scale"><draw:image xlink:href="media/image3.png" xlink:type="simple" xlink:show="embed" xlink:actuate="onLoad"/><svg:title/><svg:desc/></draw:frame></text:p>
      <text:p text:style-name="P166"><text:span text:style-name="T167">Рисунок 3 – Открытие gedit.</text:span></text:p>
      <text:p text:style-name="P168"><draw:frame draw:style-name="a3" draw:name="Рисунок 4" text:anchor-type="as-char" svg:x="0in" svg:y="0in" svg:width="5.11458in" svg:height="2.91667in" style:rel-width="scale" style:rel-height="scale"><draw:image xlink:href="media/image4.png" xlink:type="simple" xlink:show="embed" xlink:actuate="onLoad"/><svg:title/><svg:desc/></draw:frame></text:p>
      <text:p text:style-name="P169"><text:span text:style-name="T170">Рисунок 4 – Набор строк в gedit.</text:span></text:p>
      <text:p text:style-name="P171"><draw:frame draw:style-name="a4" draw:name="Рисунок 5" text:anchor-type="as-char" svg:x="0in" svg:y="0in" svg:width="3.9063in" svg:height="2.3126in" style:rel-width="scale" style:rel-height="scale"><draw:image xlink:href="media/image5.png" xlink:type="simple" xlink:show="embed" xlink:actuate="onLoad"/><svg:title/><svg:desc/></draw:frame></text:p>
      <text:p text:style-name="P172"><text:span text:style-name="T173">Рисунок 5 – Вывод<text:s/></text:span><text:span text:style-name="T174">содержимого.</text:span></text:p>
      <text:p text:style-name="P175"/>
      <text:p text:style-name="P176"><text:span text:style-name="T177">Снова открыли текстовый редактор gedit и написали 25 строк. Сохранили содержимое и закрыли gedit. В терминале вывели содержимое файла 2 разными командами и сравнили результат: команда cat <text:s/>Результат представлен на рисунках 6-8.</text:span></text:p>
      <text:p text:style-name="P178"><draw:frame draw:style-name="a5" draw:name="Рисунок 6" text:anchor-type="as-char" svg:x="0in" svg:y="0in" svg:width="4.60417in" svg:height="2.86458in" style:rel-width="scale" style:rel-height="scale"><draw:image xlink:href="media/image6.png" xlink:type="simple" xlink:show="embed" xlink:actuate="onLoad"/><svg:title/><svg:desc/></draw:frame></text:p>
      <text:p text:style-name="P179"><text:span text:style-name="T180">Рисунок 6 –<text:s/></text:span><text:span text:style-name="T181">Набор 25 строк в gedit.</text:span></text:p>
      <text:p text:style-name="P182"/>
      <text:p text:style-name="P183"><draw:frame draw:style-name="a6" draw:name="Рисунок 7" text:anchor-type="as-char" svg:x="0in" svg:y="0in" svg:width="4.79167in" svg:height="3.03125in" style:rel-width="scale" style:rel-height="scale"><draw:image xlink:href="media/image7.png" xlink:type="simple" xlink:show="embed" xlink:actuate="onLoad"/><svg:title/><svg:desc/></draw:frame></text:p>
      <text:p text:style-name="P184"><text:span text:style-name="T185">Рисунок 7 – Вывод текста командой cat.</text:span></text:p>
      <text:p text:style-name="P186"><draw:frame draw:style-name="a7" draw:name="Рисунок 8" text:anchor-type="as-char" svg:x="0in" svg:y="0in" svg:width="5.2189in" svg:height="2.7398in" style:rel-width="scale" style:rel-height="scale"><draw:image xlink:href="media/image8.png" xlink:type="simple" xlink:show="embed" xlink:actuate="onLoad"/><svg:title/><svg:desc/></draw:frame></text:p>
      <text:p text:style-name="P187"><text:span text:style-name="T188">Рисунок 8 – Вывод текста командой more.</text:span></text:p>
      <text:p text:style-name="P189"><text:span text:style-name="T190">Создали новый директорий lb и скопировали туда файл lab3 командой cp. С помощью команды ls проверили содержимое каталога lb и убедились, что<text:s/></text:span><text:span text:style-name="T191">файл скопирован. Затем попытались снова скопировать, но ничего не менялось, потому что операционная система использует имена файлов для их уникальной идентификации. Результат представлен на рисунке 9.</text:span></text:p>
      <text:p text:style-name="P192"><draw:frame draw:style-name="a8" draw:name="Рисунок 9" text:anchor-type="as-char" svg:x="0in" svg:y="0in" svg:width="5.8752in" svg:height="1.6874in" style:rel-width="scale" style:rel-height="scale"><draw:image xlink:href="media/image9.png" xlink:type="simple" xlink:show="embed" xlink:actuate="onLoad"/><svg:title/><svg:desc/></draw:frame></text:p>
      <text:p text:style-name="P193"><text:span text:style-name="T194">Рисунок 9 – Копирование файла lab3 в каталог lb.</text:span></text:p>
      <text:p text:style-name="P195"><text:span text:style-name="T196">Доб</text:span><text:span text:style-name="T197">авили в имя файла lab3 последние цифры: 1,2,3,4 и скопировали в каталог lb. В домашний каталог с помощью масок (*,?,[]) скопировали файлы lab31,lab32,lab33,lab34</text:span><text:span text:style-name="T198"><text:s/></text:span><text:span text:style-name="T199">в домашний каталог и проверяли содержимое каталога командой ls и ls -l. Результат работы предс</text:span><text:span text:style-name="T200">тавлен на рисунках 10-12.</text:span></text:p>
      <text:p text:style-name="P201"/>
      <text:p text:style-name="P202"><draw:frame draw:style-name="a9" draw:name="Рисунок 10" text:anchor-type="as-char" svg:x="0in" svg:y="0in" svg:width="6.1772in" svg:height="1.7602in" style:rel-width="scale" style:rel-height="scale"><draw:image xlink:href="media/image10.png" xlink:type="simple" xlink:show="embed" xlink:actuate="onLoad"/><svg:title/><svg:desc/></draw:frame></text:p>
      <text:p text:style-name="P203"><text:span text:style-name="T204">Рисунок 10 – Копирование маской *.</text:span></text:p>
      <text:p text:style-name="P205"><draw:frame draw:style-name="a10" draw:name="Рисунок 11" text:anchor-type="as-char" svg:x="0in" svg:y="0in" svg:width="5.8854in" svg:height="2.6252in" style:rel-width="scale" style:rel-height="scale"><draw:image xlink:href="media/image11.png" xlink:type="simple" xlink:show="embed" xlink:actuate="onLoad"/><svg:title/><svg:desc/></draw:frame></text:p>
      <text:p text:style-name="P206"><text:span text:style-name="T207">Рисунок 11 – Копирование маской ?.</text:span></text:p>
      <text:p text:style-name="P208"><draw:frame draw:style-name="a11" draw:name="Рисунок 12" text:anchor-type="as-char" svg:x="0in" svg:y="0in" svg:width="5.4374in" svg:height="3in" style:rel-width="scale" style:rel-height="scale"><draw:image xlink:href="media/image12.png" xlink:type="simple" xlink:show="embed" xlink:actuate="onLoad"/><svg:title/><svg:desc/></draw:frame></text:p>
      <text:p text:style-name="P209"><text:span text:style-name="T210">Рисунок 12 – Копирование маской [].</text:span></text:p>
      <text:p text:style-name="P211"><text:span text:style-name="T212">Командой rm удалили скопированные масками файлы (lab31,lab32,lab33,lab34) командой rm lab3? и проверили содержимое ка</text:span><text:span text:style-name="T213">талога. Результат представлен на рисунке 13.</text:span></text:p>
      <text:p text:style-name="P214"><draw:frame draw:style-name="a12" draw:name="Рисунок 13" text:anchor-type="as-char" svg:x="0in" svg:y="0in" svg:width="5.8335in" svg:height="2.9583in" style:rel-width="scale" style:rel-height="scale"><draw:image xlink:href="media/image13.png" xlink:type="simple" xlink:show="embed" xlink:actuate="onLoad"/><svg:title/><svg:desc/></draw:frame></text:p>
      <text:p text:style-name="P215"><text:span text:style-name="T216">Рисунок 13 – Содержимое каталога после удаления файлов.</text:span></text:p>
      <text:p text:style-name="P217"><text:span text:style-name="T218">Исходя из задания нашего варианта, создали новый каталог var и файл final и <text:s/>записали содержимое домашнего каталога. С помощью команды cat<text:s/></text:span><text:span text:style-name="T219">проверили содержимое файла. Результат представлен на рисунке 14.</text:span></text:p>
      <text:p text:style-name="P220"><draw:frame draw:style-name="a13" draw:name="Рисунок 14" text:anchor-type="as-char" svg:x="0in" svg:y="0in" svg:width="5.8854in" svg:height="2.9165in" style:rel-width="scale" style:rel-height="scale"><draw:image xlink:href="media/image14.png" xlink:type="simple" xlink:show="embed" xlink:actuate="onLoad"/><svg:title/><svg:desc/></draw:frame></text:p>
      <text:p text:style-name="P221"><text:span text:style-name="T222">Рисунок 14 – Запись в файл содержимого домашнего каталога.</text:span></text:p>
      <text:p text:style-name="P223"><text:span text:style-name="T224">В новый файл result записали отфильтированное содержимое файла final. Фильтр содержал следующее: чтобы в названии файла/папки был</text:span><text:span text:style-name="T225">а хотя бы одна буква s. Вывели содержимое файла result. Результат представлен на рисунке 15.</text:span></text:p>
      <text:p text:style-name="P226"><draw:frame draw:style-name="a14" draw:name="Рисунок 15" text:anchor-type="as-char" svg:x="0in" svg:y="0in" svg:width="6.0417in" svg:height="2.9689in" style:rel-width="scale" style:rel-height="scale"><draw:image xlink:href="media/image15.png" xlink:type="simple" xlink:show="embed" xlink:actuate="onLoad"/><svg:title/><svg:desc/></draw:frame></text:p>
      <text:p text:style-name="P227"><text:span text:style-name="T228">Рисунок 15 – Фильтрация и запись в файл.</text:span></text:p>
      <text:p text:style-name="P229"><text:span text:style-name="T230">Вывод</text:span></text:p>
      <text:p text:style-name="P231"><text:span text:style-name="T232">В ходе выполнения лабораторной работы изучили особенности формирования и выполнения некоторых команд оболочки Bour</text:span><text:span text:style-name="T233">n shell операционной системы Linu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XO Thames" svg:font-family="XO Thame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PT Astra Serif" svg:font-family="PT Astra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text-align="justify" fo:margin-top="0.0833in" fo:margin-bottom="0.0833in"/>
      <style:text-properties style:font-name="XO Thames" style:font-name-asian="XO Thames" style:font-name-complex="XO Thames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8" style:display-name="ListLabel 8" style:family="paragraph">
      <style:text-properties fo:hyphenate="false"/>
    </style:style>
    <style:style style:name="ListLabel14" style:display-name="ListLabel 14" style:family="paragraph">
      <style:text-properties fo:hyphenate="false"/>
    </style:style>
    <style:style style:name="ListLabel17" style:display-name="ListLabel 17" style:family="paragraph"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11" style:display-name="ListLabel 11" style:family="paragraph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Текстотчета" style:display-name="Текст отчета" style:family="paragraph" style:parent-style-name="Standard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Index" style:display-name="Index" style:family="paragraph" style:parent-style-name="Standard">
      <style:text-properties fo:hyphenate="false"/>
    </style:style>
    <style:style style:name="Основнойшрифтабзаца1" style:display-name="Основной шрифт абзаца1" style:family="paragraph">
      <style:text-properties fo:hyphenate="false"/>
    </style:style>
    <style:style style:name="ListLabel4" style:display-name="ListLabel 4" style:family="paragraph"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3" style:display-name="ListLabel 3" style:family="paragraph"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ТекстотчетаЗнак" style:display-name="Текст отчета Знак" style:family="paragraph" style:parent-style-name="Основнойшрифтабзаца1"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ListLabel16" style:display-name="ListLabel 16" style:family="paragraph"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ижнийколонтитулЗнак" style:display-name="Нижний колонтитул Знак" style:family="paragraph" style:parent-style-name="Основнойшрифтабзаца1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ListLabel15" style:display-name="ListLabel 15" style:family="paragraph">
      <style:text-properties fo:hyphenate="false"/>
    </style:style>
    <style:style style:name="Contents1" style:display-name="Contents 1" style:family="paragraph" style:parent-style-name="Standard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ListLabel13" style:display-name="ListLabel 13" style:family="paragraph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Код" style:display-name="Код" style:family="paragraph" style:parent-style-name="Standard">
      <style:paragraph-properties fo:text-align="justify" fo:margin-bottom="0in" fo:line-height="150%" fo:text-indent="0.4923in"/>
      <style:text-properties style:font-name="Courier New" style:font-name-asian="Courier New" style:font-name-complex="Courier New" fo:font-weight="bold" style:font-weight-asian="bold" style:font-weight-complex="bold" fo:hyphenate="false"/>
    </style:style>
    <style:style style:name="ListLabel10" style:display-name="ListLabel 10" style:family="paragraph">
      <style:text-properties fo:hyphenate="false"/>
    </style:style>
    <style:style style:name="ListLabel9" style:display-name="ListLabel 9" style:family="paragraph">
      <style:text-properties fo:hyphenate="false"/>
    </style:style>
    <style:style style:name="ListLabel12" style:display-name="ListLabel 12" style:family="paragraph">
      <style:text-properties fo:hyphenate="false"/>
    </style:style>
    <style:style style:name="ВерхнийколонтитулЗнак" style:display-name="Верхний колонтитул Знак" style:family="paragraph" style:parent-style-name="Основнойшрифтабзаца1"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5" style:display-name="ListLabel 5" style:family="paragraph"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1" style:display-name="ListLabel 1" style:family="paragraph">
      <style:text-properties fo:hyphenate="false"/>
    </style:style>
    <style:style style:name="КодЗнак" style:display-name="Код Знак" style:family="paragraph" style:parent-style-name="Основнойшрифтабзаца1">
      <style:text-properties style:font-name="Courier New" style:font-name-asian="Courier New" style:font-name-complex="Courier New" fo:font-weight="bold" style:font-weight-asian="bold" style:font-weight-complex="bold" fo:hyphenate="false"/>
    </style:style>
    <style:style style:name="ListLabel7" style:display-name="ListLabel 7" style:family="paragraph">
      <style:text-properties fo:hyphenate="false"/>
    </style:style>
    <style:style style:name="ListLabel2" style:display-name="ListLabel 2" style:family="paragraph"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text-align="justify"/>
      <style:text-properties style:font-name="XO Thames" style:font-name-asian="XO Thames" style:font-name-complex="XO Thames" fo:font-style="italic" style:font-style-asian="italic" style:font-style-complex="italic" fo:font-size="12pt" style:font-size-asian="12pt" style:font-size-complex="12pt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margin-top="0.3937in" fo:margin-bottom="0.3937in"/>
      <style:text-properties style:font-name="XO Thames" style:font-name-asian="XO Thames" style:font-name-complex="XO Thames" fo:font-weight="bold" style:font-weight-asian="bold" style:font-weight-complex="bold" fo:text-transform="uppercase" fo:font-size="20pt" style:font-size-asian="20pt" style:font-size-complex="20pt" fo:hyphenate="false"/>
    </style:style>
    <style:style style:name="ListLabel18" style:display-name="ListLabel 18" style:family="paragraph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6" style:display-name="ListLabel 6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P2"><text:page-number text:fixed="false">1</text:page-number></text:p>
        <text:p text:style-name="Нижнийколонтитул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eo</meta:initial-creator>
    <dc:creator>Sereo</dc:creator>
    <meta:creation-date>2025-10-14T20:19:00Z</meta:creation-date>
    <dc:date>2025-10-14T20:19:00Z</dc:date>
    <meta:template xlink:href="Normal" xlink:type="simple"/>
    <meta:editing-cycles>2</meta:editing-cycles>
    <meta:editing-duration>PT0S</meta:editing-duration>
    <meta:document-statistic meta:page-count="3" meta:paragraph-count="11" meta:word-count="833" meta:character-count="5576" meta:row-count="39" meta:non-whitespace-character-count="4754"/>
  </office:meta>
</office:document-meta>
</file>