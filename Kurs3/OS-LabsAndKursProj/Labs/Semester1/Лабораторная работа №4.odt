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10.png" manifest:media-type="image/png"/>
  <manifest:file-entry manifest:full-path="Media/11.png" manifest:media-type="image/png"/>
  <manifest:file-entry manifest:full-path="Media/12.png" manifest:media-type="image/png"/>
  <manifest:file-entry manifest:full-path="Media/2.png" manifest:media-type="image/png"/>
  <manifest:file-entry manifest:full-path="Media/3.png" manifest:media-type="image/png"/>
  <manifest:file-entry manifest:full-path="Media/4.png" manifest:media-type="image/png"/>
  <manifest:file-entry manifest:full-path="Media/5.png" manifest:media-type="image/png"/>
  <manifest:file-entry manifest:full-path="Media/6.png" manifest:media-type="image/png"/>
  <manifest:file-entry manifest:full-path="Media/7.png" manifest:media-type="image/png"/>
  <manifest:file-entry manifest:full-path="Media/8.png" manifest:media-type="image/png"/>
  <manifest:file-entry manifest:full-path="Media/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Arial" svg:font-family="Arial"/>
    <style:font-face style:name="PT Astra Serif" svg:font-family="PT Astra Serif"/>
    <style:font-face style:name="Times New Roman" svg:font-family="Times New Roman"/>
  </office:font-face-decls>
  <office:automatic-styles>
    <style:style style:family="paragraph" style:name="P11" style:parent-style-name="Standard">
      <style:paragraph-properties fo:line-height="100%" fo:margin-bottom="0pt" fo:margin-left="0pt" fo:margin-top="0pt" fo:text-align="center" fo:text-indent="35.46pt" loext:contextual-spacing="false"/>
    </style:style>
    <style:style co:numbering-list-id="list_1" style:family="paragraph" style:list-style-name="numList_1" style:name="P9" style:parent-style-name="Standard">
      <style:paragraph-properties fo:margin-bottom="7.2pt" fo:margin-left="7.2pt" fo:text-indent="28.8pt"/>
    </style:style>
    <style:style style:family="paragraph" style:name="P10" style:parent-style-name="Standard">
      <style:paragraph-properties fo:line-height="150%" fo:margin-bottom="0pt" fo:margin-left="0pt" fo:margin-top="0pt" fo:text-align="center" fo:text-indent="35.46pt" loext:contextual-spacing="false"/>
    </style:style>
    <style:style style:family="paragraph" style:name="P8" style:parent-style-name="Standard">
      <style:paragraph-properties fo:margin-left="0pt" fo:text-align="justify" fo:text-indent="36pt"/>
    </style:style>
    <style:style style:family="paragraph" style:name="P6" style:parent-style-name="Standard">
      <style:paragraph-properties fo:line-height="150%" fo:margin-bottom="0pt" fo:margin-left="141.588pt" fo:margin-top="0pt" fo:text-align="justify" fo:text-indent="0pt" loext:contextual-spacing="false"/>
    </style:style>
    <style:style style:family="paragraph" style:name="P5" style:parent-style-name="Standard">
      <style:paragraph-properties fo:line-height="150%" fo:margin-bottom="0pt" fo:margin-top="0pt" fo:text-align="end" loext:contextual-spacing="false"/>
    </style:style>
    <style:style style:family="paragraph" style:name="P12" style:parent-style-name="Standard">
      <style:paragraph-properties fo:line-height="150%" fo:margin-bottom="0pt" fo:margin-left="0pt" fo:margin-top="0pt" fo:text-align="start" fo:text-indent="35.46pt" loext:contextual-spacing="false"/>
    </style:style>
    <style:style style:family="paragraph" style:name="P4" style:parent-style-name="Standard">
      <style:paragraph-properties fo:line-height="150%" fo:margin-bottom="0pt" fo:margin-left="176.9976pt" fo:margin-top="0pt" fo:text-align="justify" fo:text-indent="0pt" loext:contextual-spacing="false"/>
    </style:style>
    <style:style style:family="paragraph" style:name="P3" style:parent-style-name="Standard">
      <style:paragraph-properties fo:line-height="150%" fo:margin-bottom="0pt" fo:margin-top="0pt" fo:text-align="center" loext:contextual-spacing="false"/>
      <style:text-properties fo:color="#000000" fo:font-family="Times New Roman" fo:font-size="14pt" style:font-name="Times New Roman" style:font-size-asian="14pt" style:font-size-complex="14pt">
        <co:theme-color>
          <value>
            <rgba>000000FF</rgba>
          </value>
        </co:theme-color>
      </style:text-properties>
    </style:style>
    <style:style style:family="paragraph" style:name="P2" style:parent-style-name="Standard">
      <style:paragraph-properties fo:line-height="150%" fo:margin-bottom="0pt" fo:margin-top="0pt" fo:text-align="center" loext:contextual-spacing="false"/>
    </style:style>
    <style:style style:family="paragraph" style:name="P13" style:parent-style-name="Standard">
      <style:paragraph-properties fo:line-height="150%" fo:margin-bottom="0pt" fo:margin-left="0pt" fo:margin-top="0pt" fo:text-align="center" fo:text-indent="35.46pt" loext:contextual-spacing="false"/>
      <style:text-properties fo:color="#000000" fo:font-family="Times New Roman" fo:font-size="14pt" style:font-name="Times New Roman" style:font-size-asian="14pt" style:font-size-complex="14pt">
        <co:theme-color>
          <value>
            <rgba>000000FF</rgba>
          </value>
        </co:theme-color>
      </style:text-properties>
    </style:style>
    <style:style style:family="paragraph" style:name="P7" style:parent-style-name="Standard">
      <style:paragraph-properties fo:line-height="150%" fo:margin-bottom="0pt" fo:margin-left="0pt" fo:margin-top="0pt" fo:text-align="justify" fo:text-indent="35.46pt" loext:contextual-spacing="false"/>
    </style:style>
    <style:style style:family="paragraph" style:master-page-name="Standard" style:name="P1" style:parent-style-name="Standard">
      <style:paragraph-properties fo:line-height="150%" fo:margin-bottom="0pt" fo:margin-top="0pt" fo:text-align="center" loext:contextual-spacing="false"/>
    </style:style>
    <style:style style:family="text" style:name="T8">
      <style:text-properties fo:color="#000000" fo:font-family="Times New Roman" fo:font-size="14pt" fo:font-weight="normal" style:font-name="Times New Roman" style:font-size-asian="14pt" style:font-size-complex="14pt" style:font-weight-asian="normal" style:font-weight-complex="normal">
        <co:theme-color>
          <value>
            <rgba>000000FF</rgba>
          </value>
        </co:theme-color>
      </style:text-properties>
    </style:style>
    <style:style style:family="text" style:name="T7">
      <style:text-properties fo:font-family="PT Astra Serif" fo:font-size="14pt" style:font-name="PT Astra Serif" style:font-size-asian="14pt" style:font-size-complex="14pt"/>
    </style:style>
    <style:style style:family="text" style:name="T6">
      <style:text-properties fo:color="#000000" fo:font-family="Arial" fo:font-size="16pt" fo:font-weight="bold" style:font-name="Arial" style:font-size-asian="16pt" style:font-size-complex="16pt" style:font-weight-asian="bold" style:font-weight-complex="bold">
        <co:theme-color>
          <value>
            <rgba>000000FF</rgba>
          </value>
        </co:theme-color>
      </style:text-properties>
    </style:style>
    <style:style style:family="text" style:name="T4">
      <style:text-properties fo:color="#000000" fo:font-family="PT Astra Serif" fo:font-size="14pt" style:font-name="PT Astra Serif" style:font-size-asian="14pt" style:font-size-complex="14pt">
        <co:theme-color>
          <value>
            <rgba>000000FF</rgba>
          </value>
        </co:theme-color>
      </style:text-properties>
    </style:style>
    <style:style style:family="text" style:name="T3">
      <style:text-properties fo:color="#000000" fo:font-size="14pt" style:font-size-asian="14pt" style:font-size-complex="14pt">
        <co:theme-color>
          <value>
            <rgba>000000FF</rgba>
          </value>
        </co:theme-color>
      </style:text-properties>
    </style:style>
    <style:style style:family="text" style:name="T2">
      <style:text-properties fo:color="#000000" fo:font-family="Times New Roman" fo:font-size="14pt" fo:font-weight="bold" style:font-name="Times New Roman" style:font-size-asian="14pt" style:font-size-complex="14pt" style:font-weight-asian="bold" style:font-weight-complex="bold">
        <co:theme-color>
          <value>
            <rgba>000000FF</rgba>
          </value>
        </co:theme-color>
      </style:text-properties>
    </style:style>
    <style:style style:family="text" style:name="T5">
      <style:text-properties fo:color="#000000">
        <co:theme-color>
          <value>
            <rgba>000000FF</rgba>
          </value>
        </co:theme-color>
      </style:text-properties>
    </style:style>
    <style:style style:family="text" style:name="T1">
      <style:text-properties fo:color="#000000" fo:font-family="Times New Roman" fo:font-size="14pt" style:font-name="Times New Roman" style:font-size-asian="14pt" style:font-size-complex="14pt">
        <co:theme-color>
          <value>
            <rgba>000000FF</rgba>
          </value>
        </co:theme-color>
      </style:text-properties>
    </style:style>
    <style:style style:family="graphic" style:name="Frm12" style:parent-style-name="Frame">
      <style:graphic-properties/>
    </style:style>
    <style:style style:family="graphic" style:name="Frm11" style:parent-style-name="Frame">
      <style:graphic-properties/>
    </style:style>
    <style:style style:family="graphic" style:name="Frm9" style:parent-style-name="Frame">
      <style:graphic-properties/>
    </style:style>
    <style:style style:family="graphic" style:name="Frm8" style:parent-style-name="Frame">
      <style:graphic-properties/>
    </style:style>
    <style:style style:family="graphic" style:name="Frm5" style:parent-style-name="Frame">
      <style:graphic-properties/>
    </style:style>
    <style:style style:family="graphic" style:name="Frm6" style:parent-style-name="Frame">
      <style:graphic-properties/>
    </style:style>
    <style:style style:family="graphic" style:name="Frm4" style:parent-style-name="Frame">
      <style:graphic-properties/>
    </style:style>
    <style:style style:family="graphic" style:name="Frm10" style:parent-style-name="Frame">
      <style:graphic-properties/>
    </style:style>
    <style:style style:family="graphic" style:name="Frm7" style:parent-style-name="Frame">
      <style:graphic-properties/>
    </style:style>
    <style:style style:family="graphic" style:name="Frm3" style:parent-style-name="Frame">
      <style:graphic-properties/>
    </style:style>
    <style:style style:family="graphic" style:name="Frm2" style:parent-style-name="Frame">
      <style:graphic-properties/>
    </style:style>
    <style:style style:family="graphic" style:name="Frm1" style:parent-style-name="Frame">
      <style:graphic-properties/>
    </style:style>
  </office:automatic-styles>
  <office:body>
    <office:text>
      <text:tracked-changes text:track-changes="false"/>
      <text:p co:para-mark-style-name="T1" text:style-name="P1"><text:span text:style-name="T1">Министерство науки и высшего образования Российской Федерации</text:span></text:p>
      <text:p co:para-mark-style-name="T1" text:style-name="P2"><text:span text:style-name="T1">Пензенский государственный университет</text:span></text:p>
      <text:p co:para-mark-style-name="T1" text:style-name="P2"><text:span text:style-name="T1">Кафедра «Математическое обеспечение и применение ЭВМ»</text:span></text:p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2" text:style-name="P2"><text:span text:style-name="T2">ОТЧЕТ</text:span></text:p>
      <text:p co:para-mark-style-name="T1" text:style-name="P2"><text:span text:style-name="T1">по лабораторной работе №4</text:span></text:p>
      <text:p co:para-mark-style-name="T1" text:style-name="P2"><text:span text:style-name="T1">по курсу «Операционные системы»</text:span></text:p>
      <text:p co:para-mark-style-name="T3" text:style-name="P2"><text:span text:style-name="T1">на тему «</text:span><text:span text:style-name="T4">Работа с файлами</text:span><text:span text:style-name="T1">»</text:span></text:p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5" text:style-name="P4"><text:tab/><text:tab/><text:tab/><text:span text:style-name="T1">Выполнили:</text:span></text:p>
      <text:p co:para-mark-style-name="T1" text:style-name="P5"><text:span text:style-name="T1">Студенты группы 23ВП2</text:span></text:p>
      <text:p co:para-mark-style-name="T1" text:style-name="P5"><text:span text:style-name="T1">Осин С.М.</text:span></text:p>
      <text:p co:para-mark-style-name="T1" text:style-name="P5"><text:span text:style-name="T1">Петровский В.П.</text:span></text:p>
      <text:p co:para-mark-style-name="T1" text:style-name="P5"><text:span text:style-name="T1">Ермаков С.Е.</text:span></text:p>
      <text:p co:para-mark-style-name="T5" text:style-name="P6"><text:tab/><text:tab/><text:tab/><text:tab/><text:span text:style-name="T1">Принял:</text:span></text:p>
      <text:p co:para-mark-style-name="T1" text:style-name="P5"><text:span text:style-name="T1">к.т.н. Шашков Б.Д. </text:span></text:p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2"><text:span text:style-name="T1">Пенза 2025</text:span></text:p>
      <text:p co:para-mark-style-name="T1" text:style-name="P3"/>
      <text:p co:para-mark-style-name="T6" text:style-name="P7"><text:span text:style-name="T6">Цель работы</text:span></text:p>
      <text:p co:para-mark-style-name="T7" text:style-name="P8"><text:span text:style-name="T7">Изучить особенности некоторых команд </text:span><text:span text:style-name="T7">для работы с файлами на ОС Linux.</text:span></text:p>
      <text:p co:para-mark-style-name="T6" text:style-name="P7"><text:span text:style-name="T6">Лабораторное задание</text:span></text:p>
      <text:list text:style-name="numList_1" xml:id="list_1">
        <text:list-item>
          <text:p co:para-mark-style-name="T7" text:style-name="P9"><text:span text:style-name="T7">Создать текстовый файл содержащий не менее 5 строк текста.</text:span></text:p>
        </text:list-item>
        <text:list-item>
          <text:p co:para-mark-style-name="T7" text:style-name="P9"><text:span text:style-name="T7">Создать несколько ссылок, просмотреть результаты по команде </text:span><text:span text:style-name="T7">ls -l. Просмотреть файл, обратившись к нему по ссылке. </text:span><text:span text:style-name="T7">Удалить одну ссылку и снова просмотреть результаты.</text:span></text:p>
        </text:list-item>
        <text:list-item>
          <text:p co:para-mark-style-name="T7" text:style-name="P9"><text:span text:style-name="T7">Создать символическую ссылку и просмотреть результат.</text:span></text:p>
        </text:list-item>
        <text:list-item>
          <text:p co:para-mark-style-name="T7" text:style-name="P9"><text:span text:style-name="T7">Определить тип созданного файла с использованием команды </text:span><text:span text:style-name="T7">file.</text:span></text:p>
        </text:list-item>
        <text:list-item>
          <text:p co:para-mark-style-name="T7" text:style-name="P9"><text:span text:style-name="T7">Просмотреть дамп файла</text:span><text:span text:style-name="T7">. Формат просмотра: восьмеричные числа.</text:span></text:p>
        </text:list-item>
        <text:list-item>
          <text:p co:para-mark-style-name="T7" text:style-name="P9"><text:span text:style-name="T7">Скопировать файл в тот же каталог с другим именем. Используя </text:span><text:span text:style-name="T7">редактор изменить две строки файла-копии.</text:span></text:p>
        </text:list-item>
        <text:list-item>
          <text:p co:para-mark-style-name="T7" text:style-name="P9"><text:span text:style-name="T7">Выполнить </text:span><text:span text:style-name="T7">сравнение </text:span><text:span text:style-name="T7">файлов, </text:span><text:span text:style-name="T7">используя </text:span><text:span text:style-name="T7">команду diff. </text:span><text:span text:style-name="T7">Выполнить поиск файлов по размеру в байтах.</text:span></text:p>
        </text:list-item>
        <text:list-item>
          <text:p co:para-mark-style-name="T7" text:style-name="P9"><text:span text:style-name="T7">В рабочем каталоге создать файл и проанализировать его </text:span><text:span text:style-name="T7">атрибуты.</text:span></text:p>
        </text:list-item>
        <text:list-item>
          <text:p co:para-mark-style-name="T7" text:style-name="P9"><text:span text:style-name="T7">Изменить атрибуты каталога и проанализировать результат. Атрибут: чтение для владельца.</text:span></text:p>
        </text:list-item>
        <text:list-item>
          <text:p co:para-mark-style-name="T7" text:style-name="P9"><text:span text:style-name="T7">Создать каталог и скопировать в него файл. Проанализировать </text:span><text:span text:style-name="T7">атрибуты этого каталога.</text:span></text:p>
        </text:list-item>
        <text:list-item>
          <text:p co:para-mark-style-name="T7" text:style-name="P9"><text:span text:style-name="T7">Изменить атрибуты каталога и проанализировать результат. Новый атрибут: исполнение для владельца.</text:span></text:p>
        </text:list-item>
      </text:list>
      <text:p co:para-mark-style-name="T6" text:style-name="P7"><text:span text:style-name="T6">Ход работы</text:span></text:p>
      <text:p co:para-mark-style-name="T8" text:style-name="P7"><text:span text:style-name="T8">Создали файл first, в котором написали 5 строк. Результат представлен на рисунке 1.</text:span></text:p>
      <text:p co:para-mark-style-name="T8" text:style-name="P10"><draw:frame draw:style-name="Frm1" svg:height="163.5pt" svg:width="390.7499pt" text:anchor-type="as-char"><draw:image xlink:href="Media/1.png" xlink:type="simple"/></draw:frame></text:p>
      <text:p co:para-mark-style-name="T8" text:style-name="P10"><text:span text:style-name="T8">Рисунок 1 – Создание файла first.</text:span></text:p>
      <text:p co:para-mark-style-name="T8" text:style-name="P7"><text:span text:style-name="T8">Создали несколько ссылок командой ln на файл first: first1, first2, first3, и когда вывели содержимое каталога, увидели их. Посмотрели файл, обратившись по ссылке first1. Затем удалили ссылку first2 и вывели содержимое каталога Результаты представлены на рисунке 2-3.</text:span></text:p>
      <text:p co:para-mark-style-name="T8" text:style-name="P10"><draw:frame draw:style-name="Frm2" svg:height="139.5pt" svg:width="351pt" text:anchor-type="as-char"><draw:image xlink:href="Media/2.png" xlink:type="simple"/></draw:frame></text:p>
      <text:p co:para-mark-style-name="T8" text:style-name="P11"><text:span text:style-name="T8">Рисунок 2 – Создание ссылок и вывод содержимое каталога.</text:span></text:p>
      <text:p co:para-mark-style-name="T8" text:style-name="P10"><draw:frame draw:style-name="Frm3" svg:height="157.5pt" svg:width="345.75pt" text:anchor-type="as-char"><draw:image xlink:href="Media/3.png" xlink:type="simple"/></draw:frame></text:p>
      <text:p co:para-mark-style-name="T8" text:style-name="P10"><text:span text:style-name="T8">Рисунок 3 – Удаление одной ссылки.</text:span></text:p>
      <text:p co:para-mark-style-name="T8" text:style-name="P7"><text:span text:style-name="T8">Создали символическую ссылку на файл first с помощью команды ln -s first first4 и посмотрели результат командой ls -l. Результат представлен на рисунке 4. </text:span></text:p>
      <text:p co:para-mark-style-name="T8" text:style-name="P10"><draw:frame draw:style-name="Frm4" svg:height="195pt" svg:width="305.25pt" text:anchor-type="as-char"><draw:image xlink:href="Media/4.png" xlink:type="simple"/></draw:frame></text:p>
      <text:p co:para-mark-style-name="T8" text:style-name="P10"><text:span text:style-name="T8">Рисунок 4 – Создание символической ссылки.</text:span></text:p>
      <text:p co:para-mark-style-name="T8" text:style-name="P7"><text:span text:style-name="T8">С помощью команды file и ключа доступа -i посмотрели тип созданного файла и кодировку. Результат представлен на рисунке 5.</text:span></text:p>
      <text:p co:para-mark-style-name="T8" text:style-name="P10"><draw:frame draw:style-name="Frm5" svg:height="186.75pt" svg:width="358.5pt" text:anchor-type="as-char"><draw:image xlink:href="Media/5.png" xlink:type="simple"/></draw:frame></text:p>
      <text:p co:para-mark-style-name="T8" text:style-name="P10"><text:span text:style-name="T8">Рисунок 5 – Вывод типа и кодировки файла.</text:span></text:p>
      <text:p co:para-mark-style-name="T8" text:style-name="P7"><text:span text:style-name="T8">С помощью команды od вывели дамп файла. Формат просмотра – восьмеричные числа. Результат представлен на рисунке 6.</text:span></text:p>
      <text:p co:para-mark-style-name="T8" text:style-name="P10"><draw:frame draw:style-name="Frm6" svg:height="105pt" svg:width="313.5pt" text:anchor-type="as-char"><draw:image xlink:href="Media/6.png" xlink:type="simple"/></draw:frame></text:p>
      <text:p co:para-mark-style-name="T8" text:style-name="P10"><text:span text:style-name="T8">Рисунок 6 – Вывод дампа файла.</text:span></text:p>
      <text:p co:para-mark-style-name="T8" text:style-name="P7"><text:span text:style-name="T8">Скопировали в текущем каталоге файл first и назвали second. В скопированном файле поменяли 2 строчки и сравнили файлы командой diff. Результат представлен на рисунке 7.</text:span></text:p>
      <text:p co:para-mark-style-name="T8" text:style-name="P10"><draw:frame draw:style-name="Frm7" svg:height="193.5pt" svg:width="393.75pt" text:anchor-type="as-char"><draw:image xlink:href="Media/7.png" xlink:type="simple"/></draw:frame></text:p>
      <text:p co:para-mark-style-name="T8" text:style-name="P10"><text:span text:style-name="T8">Рисунок 7 – Сравнение двух файлов.</text:span></text:p>
      <text:p co:para-mark-style-name="T8" text:style-name="P7"><text:span text:style-name="T8">Командой find выполнили поиск файлов по размеру в байтах. В данном случае, чтобы размер файла был равен 1000 байт. Результат представлен на рисунке 8.</text:span></text:p>
      <text:p co:para-mark-style-name="T8" text:style-name="P10"><draw:frame draw:style-name="Frm8" svg:height="169.5pt" svg:width="333pt" text:anchor-type="as-char"><draw:image xlink:href="Media/8.png" xlink:type="simple"/></draw:frame></text:p>
      <text:p co:para-mark-style-name="T8" text:style-name="P10"><text:span text:style-name="T8">Рисунок 8 – Поиск файлов по размеру в байтах.</text:span></text:p>
      <text:p co:para-mark-style-name="T8" text:style-name="P7"><text:span text:style-name="T8">Изменили атрибут каталога labs с помощью команды chmod: сделали чтение для владельца и попытались перейти в каталог. Результат представлен на рисунке 9.</text:span></text:p>
      <text:p co:para-mark-style-name="T8" text:style-name="P10"><draw:frame draw:style-name="Frm9" svg:height="120.75pt" svg:width="311.25pt" text:anchor-type="as-char"><draw:image xlink:href="Media/9.png" xlink:type="simple"/></draw:frame></text:p>
      <text:p co:para-mark-style-name="T8" text:style-name="P10"><text:span text:style-name="T8">Рисунок 9 – Изменение атрибута каталога labs.</text:span></text:p>
      <text:p co:para-mark-style-name="T8" text:style-name="P7"><text:span text:style-name="T8">Создали новый каталог second_dir и поместили туда файл third. Посмотрели атрибуты каталога командой lsattr. Результат представлен на рисунке 10.</text:span></text:p>
      <text:p co:para-mark-style-name="T8" text:style-name="P10"><draw:frame draw:style-name="Frm10" svg:height="150pt" svg:width="358.5pt" text:anchor-type="as-char"><draw:image xlink:href="Media/10.png" xlink:type="simple"/></draw:frame></text:p>
      <text:p co:para-mark-style-name="T8" text:style-name="P10"><text:span text:style-name="T8">Рисунок 10 – Атрибуты созданного каталога.</text:span></text:p>
      <text:p co:para-mark-style-name="T8" text:style-name="P7"><text:span text:style-name="T8">Изменили атрибут директория second_dir на исполнение владельцем. Результат представлен на рисунке 11 – 12.</text:span></text:p>
      <text:p co:para-mark-style-name="T8" text:style-name="P10"><draw:frame draw:style-name="Frm11" svg:height="165.75pt" svg:width="416.25pt" text:anchor-type="as-char"><draw:image xlink:href="Media/11.png" xlink:type="simple"/></draw:frame></text:p>
      <text:p co:para-mark-style-name="T8" text:style-name="P10"><text:span text:style-name="T8">Рисунок 11 – Установка атрибута: исполнение для владельца.</text:span></text:p>
      <text:p co:para-mark-style-name="T8" text:style-name="P10"><draw:frame draw:style-name="Frm12" svg:height="235.5pt" svg:width="356.25pt" text:anchor-type="as-char"><draw:image xlink:href="Media/12.png" xlink:type="simple"/></draw:frame></text:p>
      <text:p co:para-mark-style-name="T8" text:style-name="P10"><text:span text:style-name="T8">Рисунок 12 – Попытка открытия каталога не в терминале.</text:span></text:p>
      <text:p co:para-mark-style-name="T6" text:style-name="P12"><text:span text:style-name="T6">Вывод</text:span></text:p>
      <text:p co:para-mark-style-name="T1" text:style-name="P7"><text:span text:style-name="T1">В ходе выполнения лабораторной работы изучили особенности некоторых комад для работы с файлами на ОС Linux.</text:span></text:p>
      <text:p co:para-mark-style-name="T1" text:style-name="P13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Courier New" svg:font-family="Courier New"/>
    <style:font-face style:name="Liberation Sans" svg:font-family="Liberation Sans"/>
    <style:font-face style:name="Times New Roman" svg:font-family="Times New Roman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loext:contextual-spacing="false" style:tab-stop-distance="35.4024pt"/>
      <style:text-properties fo:background-color="transparent" fo:color="#000000" fo:font-family="Calibri" fo:font-size="11pt" fo:letter-spacing="0pt" style:font-name="Calibri" style:font-size-asian="11pt" style:font-size-complex="11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ListLabel 1" style:family="paragraph" style:name="ListLabel_1"/>
    <style:style style:display-name="ListLabel 7" style:family="paragraph" style:name="ListLabel_7"/>
    <style:style style:display-name="ListLabel 11" style:family="paragraph" style:name="ListLabel_11"/>
    <style:style style:display-name="Contents 2" style:family="paragraph" style:name="Contents_2" style:next-style-name="Standard" style:parent-style-name="Standard">
      <style:paragraph-properties fo:margin-left="10.008pt" fo:text-align="start" fo:text-indent="0pt"/>
      <style:text-properties fo:font-family="XO Thames" fo:font-size="14pt" style:font-name="XO Thames" style:font-size-asian="14pt" style:font-size-complex="14pt"/>
    </style:style>
    <style:style style:display-name="ListLabel 15" style:family="paragraph" style:name="ListLabel_15"/>
    <style:style style:display-name="Contents 4" style:family="paragraph" style:name="Contents_4" style:next-style-name="Standard" style:parent-style-name="Standard">
      <style:paragraph-properties fo:margin-left="29.988pt" fo:text-align="start" fo:text-indent="0pt"/>
      <style:text-properties fo:font-family="XO Thames" fo:font-size="14pt" style:font-name="XO Thames" style:font-size-asian="14pt" style:font-size-complex="14pt"/>
    </style:style>
    <style:style style:display-name="ListLabel 18" style:family="paragraph" style:name="ListLabel_18"/>
    <style:style style:display-name="Contents 6" style:family="paragraph" style:name="Contents_6" style:next-style-name="Standard" style:parent-style-name="Standard">
      <style:paragraph-properties fo:margin-left="50.004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 style:parent-style-name="Standard">
      <style:paragraph-properties fo:margin-left="60.012pt" fo:text-align="start" fo:text-indent="0pt"/>
      <style:text-properties fo:font-family="XO Thames" fo:font-size="14pt" style:font-name="XO Thames" style:font-size-asian="14pt" style:font-size-complex="14pt"/>
    </style:style>
    <style:style style:display-name="ListLabel 12" style:family="paragraph" style:name="ListLabel_12"/>
    <style:style co:is-default-style="true" style:display-name="Standard" style:family="paragraph" style:name="Standard">
      <style:paragraph-properties fo:line-height="108%" fo:margin-bottom="7.992pt" fo:margin-top="0pt" fo:orphans="2" fo:text-align="start" fo:widows="2" loext:contextual-spacing="false"/>
    </style:style>
    <style:style style:display-name="ListLabel 14" style:family="paragraph" style:name="ListLabel_14"/>
    <style:style style:display-name="ListLabel 9" style:family="paragraph" style:name="ListLabel_9"/>
    <style:style style:default-outline-level="3" style:display-name="Heading 3" style:family="paragraph" style:list-style-name="" style:name="Heading_3" style:next-style-name="Standard" style:parent-style-name="Standard">
      <style:paragraph-properties fo:margin-bottom="6.012pt" fo:margin-top="6.012pt" fo:text-align="justify" loext:contextual-spacing="false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ListLabel 5" style:family="paragraph" style:name="ListLabel_5"/>
    <style:style style:display-name="Текст отчета Знак" style:family="paragraph" style:name="Текст_отчета_Знак" style:parent-style-name="Default_Paragraph_Font">
      <style:text-properties fo:font-family="Times New Roman" fo:font-size="14pt" style:font-name="Times New Roman" style:font-size-asian="14pt" style:font-size-complex="14pt"/>
    </style:style>
    <style:style style:display-name="List Paragraph" style:family="paragraph" style:name="List_Paragraph" style:parent-style-name="Standard">
      <style:paragraph-properties fo:margin-bottom="7.992pt" fo:margin-left="36pt" fo:margin-top="0pt" fo:text-indent="0pt" loext:contextual-spacing="true"/>
    </style:style>
    <style:style style:display-name="List" style:family="paragraph" style:name="List" style:parent-style-name="Text_body"/>
    <style:style style:display-name="Index" style:family="paragraph" style:name="Index" style:parent-style-name="Standard"/>
    <style:style style:display-name="Header" style:family="paragraph" style:name="Header" style:parent-style-name="Standard">
      <style:paragraph-properties fo:line-height="100%" fo:margin-bottom="0pt" fo:margin-top="0pt" loext:contextual-spacing="false">
        <style:tab-stops>
          <style:tab-stop style:leader-style="none" style:position="233.856pt" style:type="center"/>
          <style:tab-stop style:leader-style="none" style:position="467.748pt" style:type="right"/>
        </style:tab-stops>
      </style:paragraph-properties>
    </style:style>
    <style:style style:display-name="ListLabel 17" style:family="paragraph" style:name="ListLabel_17"/>
    <style:style style:display-name="Text body" style:family="paragraph" style:name="Text_body" style:parent-style-name="Standard">
      <style:paragraph-properties fo:line-height="115%" fo:margin-bottom="6.9984pt" fo:margin-top="0pt" loext:contextual-spacing="false"/>
    </style:style>
    <style:style style:display-name="Contents 3" style:family="paragraph" style:name="Contents_3" style:next-style-name="Standard" style:parent-style-name="Standard">
      <style:paragraph-properties fo:margin-left="20.016pt" fo:text-align="start" fo:text-indent="0pt"/>
      <style:text-properties fo:font-family="XO Thames" fo:font-size="14pt" style:font-name="XO Thames" style:font-size-asian="14pt" style:font-size-complex="14pt"/>
    </style:style>
    <style:style style:display-name="ListLabel 2" style:family="paragraph" style:name="ListLabel_2"/>
    <style:style style:display-name="ListLabel 4" style:family="paragraph" style:name="ListLabel_4"/>
    <style:style style:display-name="Верхний колонтитул Знак" style:family="paragraph" style:name="Верхний_колонтитул_Знак" style:parent-style-name="Default_Paragraph_Font"/>
    <style:style style:display-name="ListLabel 8" style:family="paragraph" style:name="ListLabel_8"/>
    <style:style style:default-outline-level="5" style:display-name="Heading 5" style:family="paragraph" style:list-style-name="" style:name="Heading_5" style:next-style-name="Standard" style:parent-style-name="Standard">
      <style:paragraph-properties fo:margin-bottom="6.012pt" fo:margin-top="6.012pt" fo:text-align="justify" loext:contextual-spacing="false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isplay-name="Default Paragraph Font" style:family="paragraph" style:name="Default_Paragraph_Font"/>
    <style:style style:display-name="ListLabel 6" style:family="paragraph" style:name="ListLabel_6"/>
    <style:style style:default-outline-level="1" style:display-name="Heading 1" style:family="paragraph" style:list-style-name="" style:name="Heading_1" style:next-style-name="Standard" style:parent-style-name="Standard">
      <style:paragraph-properties fo:margin-bottom="6.012pt" fo:margin-top="6.012pt" fo:text-align="justify" loext:contextual-spacing="false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ListLabel 10" style:family="paragraph" style:name="ListLabel_10"/>
    <style:style style:display-name="Internet link" style:family="paragraph" style:name="Internet_link">
      <style:text-properties fo:color="#0000FF" style:text-underline-color="font-color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 style:paren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 style:parent-style-name="Standard"/>
    <style:style style:display-name="ListLabel 16" style:family="paragraph" style:name="ListLabel_16"/>
    <style:style style:display-name="Footer" style:family="paragraph" style:name="Footer" style:parent-style-name="Standard">
      <style:paragraph-properties fo:line-height="100%" fo:margin-bottom="0pt" fo:margin-top="0pt" loext:contextual-spacing="false">
        <style:tab-stops>
          <style:tab-stop style:leader-style="none" style:position="233.856pt" style:type="center"/>
          <style:tab-stop style:leader-style="none" style:position="467.748pt" style:type="right"/>
        </style:tab-stops>
      </style:paragraph-properties>
    </style:style>
    <style:style style:display-name="Contents 9" style:family="paragraph" style:name="Contents_9" style:next-style-name="Standard" style:parent-style-name="Standard">
      <style:paragraph-properties fo:margin-left="79.992pt" fo:text-align="start" fo:text-indent="0pt"/>
      <style:text-properties fo:font-family="XO Thames" fo:font-size="14pt" style:font-name="XO Thames" style:font-size-asian="14pt" style:font-size-complex="14pt"/>
    </style:style>
    <style:style style:display-name="ListLabel 13" style:family="paragraph" style:name="ListLabel_13"/>
    <style:style style:display-name="Contents 8" style:family="paragraph" style:name="Contents_8" style:next-style-name="Standard" style:parent-style-name="Standard">
      <style:paragraph-properties fo:margin-left="69.984pt" fo:text-align="start" fo:text-indent="0pt"/>
      <style:text-properties fo:font-family="XO Thames" fo:font-size="14pt" style:font-name="XO Thames" style:font-size-asian="14pt" style:font-size-complex="14pt"/>
    </style:style>
    <style:style style:display-name="Нижний колонтитул Знак" style:family="paragraph" style:name="Нижний_колонтитул_Знак" style:parent-style-name="Default_Paragraph_Font"/>
    <style:style style:display-name="Contents 5" style:family="paragraph" style:name="Contents_5" style:next-style-name="Standard" style:parent-style-name="Standard">
      <style:paragraph-properties fo:margin-left="39.996pt" fo:text-align="start" fo:text-indent="0pt"/>
      <style:text-properties fo:font-family="XO Thames" fo:font-size="14pt" style:font-name="XO Thames" style:font-size-asian="14pt" style:font-size-complex="14pt"/>
    </style:style>
    <style:style style:display-name="Caption" style:family="paragraph" style:name="Caption" style:parent-style-name="Standard">
      <style:paragraph-properties fo:margin-bottom="6.012pt" fo:margin-top="6.012pt" loext:contextual-spacing="false"/>
      <style:text-properties fo:font-size="12pt" fo:font-style="italic" style:font-size-asian="12pt" style:font-size-complex="12pt" style:font-style-asian="italic" style:font-style-complex="italic"/>
    </style:style>
    <style:style style:display-name="Текст отчета" style:family="paragraph" style:name="Текст_отчета" style:parent-style-name="Standard">
      <style:paragraph-properties fo:line-height="150%" fo:margin-bottom="0pt" fo:margin-left="0pt" fo:margin-top="0pt" fo:text-align="justify" fo:text-indent="35.46pt" loext:contextual-spacing="false"/>
      <style:text-properties fo:font-family="Times New Roman" fo:font-size="14pt" style:font-name="Times New Roman" style:font-size-asian="14pt" style:font-size-complex="14pt"/>
    </style:style>
    <style:style style:display-name="Код Знак" style:family="paragraph" style:name="Код_Знак" style:parent-style-name="Default_Paragraph_Font">
      <style:text-properties fo:font-family="Courier New" fo:font-weight="bold" style:font-name="Courier New" style:font-weight-asian="bold" style:font-weight-complex="bold"/>
    </style:style>
    <style:style style:display-name="Subtitle" style:family="paragraph" style:name="Subtitle" style:next-style-name="Standard" style:paren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ListLabel 3" style:family="paragraph" style:name="ListLabel_3"/>
    <style:style style:display-name="Title" style:family="paragraph" style:name="Title" style:next-style-name="Standard" style:parent-style-name="Standard">
      <style:paragraph-properties fo:margin-bottom="28.3464pt" fo:margin-top="28.3464pt" fo:text-align="center" loext:contextual-spacing="false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 style:parent-style-name="Standard">
      <style:paragraph-properties fo:margin-bottom="6.012pt" fo:margin-top="6.012pt" fo:text-align="justify" loext:contextual-spacing="false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isplay-name="Код" style:family="paragraph" style:name="Код" style:parent-style-name="Standard">
      <style:paragraph-properties fo:line-height="150%" fo:margin-bottom="0pt" fo:margin-left="0pt" fo:margin-top="0pt" fo:text-align="justify" fo:text-indent="35.46pt" loext:contextual-spacing="false"/>
      <style:text-properties fo:font-family="Courier New" fo:font-weight="bold" style:font-name="Courier New" style:font-weight-asian="bold" style:font-weight-complex="bold"/>
    </style:style>
    <style:style style:default-outline-level="2" style:display-name="Heading 2" style:family="paragraph" style:list-style-name="" style:name="Heading_2" style:next-style-name="Standard" style:parent-style-name="Standard">
      <style:paragraph-properties fo:margin-bottom="6.012pt" fo:margin-top="6.012pt" fo:text-align="justify" loext:contextual-spacing="false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ing" style:family="paragraph" style:name="Heading" style:next-style-name="Text_body" style:parent-style-name="Standard">
      <style:paragraph-properties fo:keep-with-next="always" fo:margin-bottom="6.012pt" fo:margin-top="11.988pt" loext:contextual-spacing="false"/>
      <style:text-properties fo:font-family="Liberation Sans" fo:font-size="14pt" style:font-name="Liberation Sans" style:font-size-asian="14pt" style:font-size-complex="14pt"/>
    </style:style>
    <text:list-style style:name="numList_1">
      <text:list-level-style-number style:num-format="1" style:num-prefix="" style:num-suffix="." text:level="1" text:start-value="1">
        <style:list-level-properties text:list-level-position-and-space-mode="label-alignment">
          <style:list-level-label-alignment fo:margin-left="18pt" fo:text-indent="-18pt" text:label-followed-by="listtab"/>
        </style:list-level-properties>
      </text:list-level-style-number>
      <text:list-level-style-number style:num-format="1" style:num-prefix="" style:num-suffix="." text:display-levels="2" text:level="2" text:start-value="1">
        <style:list-level-properties text:list-level-position-and-space-mode="label-alignment">
          <style:list-level-label-alignment fo:margin-left="39.5pt" fo:text-indent="-21.5pt" text:label-followed-by="listtab"/>
        </style:list-level-properties>
      </text:list-level-style-number>
      <text:list-level-style-number style:num-format="1" style:num-prefix="" style:num-suffix="." text:display-levels="3" text:level="3" text:start-value="1">
        <style:list-level-properties text:list-level-position-and-space-mode="label-alignment">
          <style:list-level-label-alignment fo:margin-left="61.25pt" fo:text-indent="-25.25pt" text:label-followed-by="listtab"/>
        </style:list-level-properties>
      </text:list-level-style-number>
      <text:list-level-style-number style:num-format="1" style:num-prefix="" style:num-suffix="." text:display-levels="4" text:level="4" text:start-value="1">
        <style:list-level-properties text:list-level-position-and-space-mode="label-alignment">
          <style:list-level-label-alignment fo:margin-left="86.5pt" fo:text-indent="-32.5pt" text:label-followed-by="listtab"/>
        </style:list-level-properties>
      </text:list-level-style-number>
      <text:list-level-style-number style:num-format="1" style:num-prefix="" style:num-suffix="." text:display-levels="5" text:level="5" text:start-value="1">
        <style:list-level-properties text:list-level-position-and-space-mode="label-alignment">
          <style:list-level-label-alignment fo:margin-left="111.5pt" fo:text-indent="-39.5pt" text:label-followed-by="listtab"/>
        </style:list-level-properties>
      </text:list-level-style-number>
      <text:list-level-style-number style:num-format="1" style:num-prefix="" style:num-suffix="." text:display-levels="6" text:level="6" text:start-value="1">
        <style:list-level-properties text:list-level-position-and-space-mode="label-alignment">
          <style:list-level-label-alignment fo:margin-left="136.75pt" fo:text-indent="-46.75pt" text:label-followed-by="listtab"/>
        </style:list-level-properties>
      </text:list-level-style-number>
      <text:list-level-style-number style:num-format="1" style:num-prefix="" style:num-suffix="." text:display-levels="7" text:level="7" text:start-value="1">
        <style:list-level-properties text:list-level-position-and-space-mode="label-alignment">
          <style:list-level-label-alignment fo:margin-left="162pt" fo:text-indent="-54pt" text:label-followed-by="listtab"/>
        </style:list-level-properties>
      </text:list-level-style-number>
      <text:list-level-style-number style:num-format="1" style:num-prefix="" style:num-suffix="." text:display-levels="8" text:level="8" text:start-value="1">
        <style:list-level-properties text:list-level-position-and-space-mode="label-alignment">
          <style:list-level-label-alignment fo:margin-left="187.25pt" fo:text-indent="-61.25pt" text:label-followed-by="listtab"/>
        </style:list-level-properties>
      </text:list-level-style-number>
      <text:list-level-style-number style:num-format="1" style:num-prefix="" style:num-suffix="." text:display-levels="9" text:level="9" text:start-value="1">
        <style:list-level-properties text:list-level-position-and-space-mode="label-alignment">
          <style:list-level-label-alignment fo:margin-left="216pt" fo:text-indent="-72pt" text:label-followed-by="listtab"/>
        </style:list-level-properties>
      </text:list-level-style-number>
    </text:list-style>
    <style:style style:family="graphic" style:name="Frame">
      <style:graphic-properties text:anchor-type="paragraph"/>
    </style:style>
  </office:styles>
  <office:automatic-styles>
    <style:style style:family="paragraph" style:name="P14" style:parent-style-name="Standard">
      <style:paragraph-properties fo:text-align="end"/>
    </style:style>
    <style:page-layout style:name="PM1">
      <style:page-layout-properties fo:margin-bottom="35.46pt" fo:margin-left="70.8912pt" fo:margin-right="42.5448pt" fo:margin-top="42.5448pt" fo:page-height="841.8888pt" fo:page-width="595.3032pt" style:num-format="1"/>
      <style:footer-style>
        <style:header-footer-properties fo:margin-top="0pt" fo:min-height="2.8656pt"/>
      </style:footer-style>
    </style:page-layout>
  </office:automatic-styles>
  <office:master-styles>
    <style:master-page style:name="Standard" style:page-layout-name="PM1">
      <style:header style:display="false"/>
      <style:footer>
        <text:tracked-changes text:track-changes="false"/>
        <text:p text:style-name="P14"><text:page-number/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Linux/29</meta:generator>
    <dc:date>2025-10-02T20:47:27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  <a:prstDash val="solid"/>
          </a:ln>
          <a:ln>
            <a:solidFill>
              <a:schemeClr val="phClr"/>
            </a:solidFill>
            <a:prstDash val="solid"/>
          </a:ln>
          <a:ln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