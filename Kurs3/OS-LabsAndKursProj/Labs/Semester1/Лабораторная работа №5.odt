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XO Thames" svg:font-family="XO Tha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ystem" svg:panose-1="2 11 6 4 2 2 2 2 2 4"/>
    <style:font-face style:name="PT Astra Serif" svg:font-family="PT Astra 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margin-bottom="0in" fo:line-height="150%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 fo:margin-bottom="0in" fo:line-height="150%"/>
    </style:style>
    <style:style style:name="T15" style:parent-style-name="DefaultParagraphFont" style:family="text">
      <style:text-properties style:font-name="Times New Roman" style:font-name-asian="PT Astra Serif" style:font-name-complex="Times New Roman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asian="PT Astra Serif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7" style:parent-style-name="DefaultParagraphFont" style:family="text">
      <style:text-properties style:font-name="Times New Roman" style:font-name-asian="PT Astra Serif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50%"/>
    </style:style>
    <style:style style:name="T19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in" fo:line-height="150%"/>
    </style:style>
    <style:style style:name="T21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margin-bottom="0in" fo:line-height="150%"/>
    </style:style>
    <style:style style:name="T23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justify" fo:margin-bottom="0in" fo:line-height="150%" fo:margin-left="2.4583in">
        <style:tab-stops/>
      </style:paragraph-properties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end" fo:margin-bottom="0in" fo:line-height="15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 fo:margin-bottom="0in" fo:line-height="15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 fo:margin-bottom="0in" fo:line-height="15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end" fo:margin-bottom="0in" fo:line-height="15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 fo:margin-bottom="0in" fo:line-height="150%" fo:margin-left="1.9666in">
        <style:tab-stops/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end" fo:margin-bottom="0in" fo:line-height="15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end" fo:margin-bottom="0in" fo:line-height="150%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margin-bottom="0in" fo:line-height="150%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margin-bottom="0in" fo:line-height="150%" fo:text-indent="0.4923in"/>
    </style:style>
    <style:style style:name="T56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paragraph-properties fo:text-align="justify" fo:text-indent="0.5in"/>
    </style:style>
    <style:style style:name="T58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margin-bottom="0in" fo:line-height="150%" fo:text-indent="0.4923in"/>
    </style:style>
    <style:style style:name="T60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paragraph-properties fo:text-align="justify" fo:margin-left="0in" fo:margin-right="0.2in" fo:text-indent="0.5in">
        <style:tab-stops/>
      </style:paragraph-properties>
    </style:style>
    <style:style style:name="T62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margin-left="0in" fo:margin-right="0.2in" fo:text-indent="0.5in">
        <style:tab-stops/>
      </style:paragraph-properties>
    </style:style>
    <style:style style:name="T64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margin-bottom="0.1in" fo:margin-left="0in" fo:margin-right="0.2in" fo:text-indent="0.5in">
        <style:tab-stops/>
      </style:paragraph-properties>
    </style:style>
    <style:style style:name="T66" style:parent-style-name="DefaultParagraphFont" style:family="text">
      <style:text-properties style:font-name="Times New Roman" style:font-name-asian="PT Astra Serif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margin-bottom="0in" fo:line-height="150%" fo:text-indent="0.4923in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paragraph-properties fo:text-align="justify" fo:text-indent="0.5in"/>
    </style:style>
    <style:style style:name="T70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71" style:parent-style-name="Standard" style:family="paragraph">
      <style:paragraph-properties fo:text-align="justify" fo:text-indent="0.5in"/>
    </style:style>
    <style:style style:name="T72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73" style:parent-style-name="Standard" style:family="paragraph">
      <style:paragraph-properties fo:text-align="center" fo:text-indent="0.5in"/>
    </style:style>
    <style:style style:name="P74" style:parent-style-name="Standard" style:family="paragraph">
      <style:paragraph-properties fo:text-align="center" fo:text-indent="0.5in"/>
    </style:style>
    <style:style style:name="T75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76" style:parent-style-name="Standard" style:family="paragraph">
      <style:paragraph-properties fo:text-align="justify" fo:text-indent="0.5in"/>
    </style:style>
    <style:style style:name="T77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78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79" style:parent-style-name="Standard" style:family="paragraph">
      <style:paragraph-properties fo:text-align="center" fo:text-indent="0.5in"/>
    </style:style>
    <style:style style:name="P80" style:parent-style-name="Standard" style:family="paragraph">
      <style:paragraph-properties fo:text-align="center" fo:text-indent="0.5in"/>
    </style:style>
    <style:style style:name="T81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82" style:parent-style-name="Standard" style:family="paragraph">
      <style:paragraph-properties fo:text-align="justify" fo:text-indent="0.5in"/>
    </style:style>
    <style:style style:name="T83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84" style:parent-style-name="Standard" style:family="paragraph">
      <style:paragraph-properties fo:text-align="center" fo:text-indent="0.5in"/>
    </style:style>
    <style:style style:name="P85" style:parent-style-name="Standard" style:family="paragraph">
      <style:paragraph-properties fo:text-align="center" fo:text-indent="0.5in"/>
    </style:style>
    <style:style style:name="T86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87" style:parent-style-name="Standard" style:family="paragraph">
      <style:paragraph-properties fo:text-align="justify" fo:text-indent="0.5in"/>
    </style:style>
    <style:style style:name="T88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89" style:parent-style-name="Standard" style:family="paragraph">
      <style:paragraph-properties fo:text-align="center" fo:text-indent="0.5in"/>
    </style:style>
    <style:style style:name="P90" style:parent-style-name="Standard" style:family="paragraph">
      <style:paragraph-properties fo:text-align="center" fo:text-indent="0.5in"/>
    </style:style>
    <style:style style:name="T91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92" style:parent-style-name="Standard" style:family="paragraph">
      <style:paragraph-properties fo:text-align="justify" fo:text-indent="0.5in"/>
    </style:style>
    <style:style style:name="T93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94" style:parent-style-name="Standard" style:family="paragraph">
      <style:paragraph-properties fo:text-align="center" fo:text-indent="0.5in"/>
    </style:style>
    <style:style style:name="P95" style:parent-style-name="Standard" style:family="paragraph">
      <style:paragraph-properties fo:text-align="center" fo:text-indent="0.5in"/>
    </style:style>
    <style:style style:name="T96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97" style:parent-style-name="Standard" style:family="paragraph">
      <style:paragraph-properties fo:text-align="center" fo:text-indent="0.5in"/>
      <style:text-properties style:font-name="PT Astra Serif" style:font-name-asian="PT Astra Serif" style:font-name-complex="PT Astra Serif" fo:font-size="14pt" style:font-size-asian="14pt" style:font-size-complex="14pt"/>
    </style:style>
    <style:style style:name="P98" style:parent-style-name="Standard" style:family="paragraph">
      <style:paragraph-properties fo:text-align="justify" fo:margin-top="0.1868in" fo:margin-bottom="0.1868in" fo:text-indent="0.5in"/>
    </style:style>
    <style:style style:name="T99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00" style:parent-style-name="Standard" style:family="paragraph">
      <style:paragraph-properties fo:text-align="center" fo:text-indent="0.5in"/>
    </style:style>
    <style:style style:name="P101" style:parent-style-name="Standard" style:family="paragraph">
      <style:paragraph-properties fo:text-align="center" fo:text-indent="0.5in"/>
    </style:style>
    <style:style style:name="T102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03" style:parent-style-name="Standard" style:family="paragraph">
      <style:paragraph-properties fo:text-align="justify" fo:text-indent="0.5in"/>
    </style:style>
    <style:style style:name="T104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05" style:parent-style-name="Standard" style:family="paragraph">
      <style:paragraph-properties fo:text-align="justify" fo:text-indent="0.5in"/>
    </style:style>
    <style:style style:name="T106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07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08" style:parent-style-name="Standard" style:family="paragraph">
      <style:paragraph-properties fo:text-align="center" fo:text-indent="0.5in"/>
    </style:style>
    <style:style style:name="P109" style:parent-style-name="Standard" style:family="paragraph">
      <style:paragraph-properties fo:text-align="center" fo:text-indent="0.5in"/>
    </style:style>
    <style:style style:name="T110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11" style:parent-style-name="Standard" style:family="paragraph">
      <style:paragraph-properties fo:margin-top="0.1868in" fo:margin-bottom="0.1868in" fo:text-indent="0.5in"/>
    </style:style>
    <style:style style:name="T112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13" style:parent-style-name="Standard" style:family="paragraph">
      <style:paragraph-properties fo:text-align="center" fo:text-indent="0.5in"/>
    </style:style>
    <style:style style:name="P114" style:parent-style-name="Standard" style:family="paragraph">
      <style:paragraph-properties fo:text-align="center" fo:text-indent="0.5in"/>
    </style:style>
    <style:style style:name="T115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16" style:parent-style-name="Standard" style:family="paragraph">
      <style:paragraph-properties fo:text-align="justify" fo:text-indent="0.5in"/>
    </style:style>
    <style:style style:name="T117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18" style:parent-style-name="Standard" style:family="paragraph">
      <style:paragraph-properties fo:text-align="center" fo:text-indent="0.5in"/>
    </style:style>
    <style:style style:name="P119" style:parent-style-name="Standard" style:family="paragraph">
      <style:paragraph-properties fo:text-align="center" fo:text-indent="0.5in"/>
    </style:style>
    <style:style style:name="T120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21" style:parent-style-name="Standard" style:family="paragraph">
      <style:paragraph-properties fo:text-align="justify" fo:text-indent="0.5in"/>
    </style:style>
    <style:style style:name="T122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23" style:parent-style-name="Standard" style:family="paragraph">
      <style:paragraph-properties fo:text-align="center" fo:text-indent="0.5in"/>
    </style:style>
    <style:style style:name="P124" style:parent-style-name="Standard" style:family="paragraph">
      <style:paragraph-properties fo:text-align="center" fo:text-indent="0.5in"/>
    </style:style>
    <style:style style:name="T125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26" style:parent-style-name="Standard" style:family="paragraph">
      <style:paragraph-properties fo:text-align="justify" fo:text-indent="0.5in"/>
    </style:style>
    <style:style style:name="T127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28" style:parent-style-name="Standard" style:family="paragraph">
      <style:paragraph-properties fo:text-align="center" fo:text-indent="0.5in"/>
    </style:style>
    <style:style style:name="P129" style:parent-style-name="Standard" style:family="paragraph">
      <style:paragraph-properties fo:text-align="center" fo:text-indent="0.5in"/>
    </style:style>
    <style:style style:name="T130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31" style:parent-style-name="Standard" style:family="paragraph">
      <style:paragraph-properties fo:text-align="justify" fo:text-indent="0.5in"/>
    </style:style>
    <style:style style:name="T132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33" style:parent-style-name="Standard" style:family="paragraph">
      <style:paragraph-properties fo:text-align="center" fo:text-indent="0.5in"/>
    </style:style>
    <style:style style:name="P134" style:parent-style-name="Standard" style:family="paragraph">
      <style:paragraph-properties fo:text-align="center" fo:text-indent="0.5in"/>
    </style:style>
    <style:style style:name="T135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36" style:parent-style-name="Standard" style:family="paragraph">
      <style:paragraph-properties fo:text-align="center" fo:text-indent="0.5in"/>
    </style:style>
    <style:style style:name="P137" style:parent-style-name="Standard" style:family="paragraph">
      <style:paragraph-properties fo:text-align="center" fo:text-indent="0.5in"/>
    </style:style>
    <style:style style:name="T138" style:parent-style-name="DefaultParagraphFont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39" style:parent-style-name="Standard" style:family="paragraph">
      <style:paragraph-properties fo:text-align="center" fo:text-indent="0.5in"/>
      <style:text-properties style:font-name="PT Astra Serif" style:font-name-asian="PT Astra Serif" style:font-name-complex="PT Astra Serif" fo:font-size="14pt" style:font-size-asian="14pt" style:font-size-complex="14pt"/>
    </style:style>
    <style:style style:name="P140" style:parent-style-name="Standard" style:family="paragraph">
      <style:paragraph-properties fo:margin-bottom="0in" fo:line-height="150%" fo:text-indent="0.4923in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paragraph-properties fo:text-align="justify" fo:margin-bottom="0in" fo:line-height="150%" fo:text-indent="0.4923in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 науки и высшего образования Российской Федерации</text:span></text:p>
      <text:p text:style-name="P4"><text:span text:style-name="T5">Пензенский государственный университет</text:span></text:p>
      <text:p text:style-name="P6"><text:span text:style-name="T7">Кафедра «Математическое обеспечение и применение ЭВМ»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</text:span><text:span text:style-name="T16">Ë</text:span><text:span text:style-name="T17">Т</text:span></text:p>
      <text:p text:style-name="P18"><text:span text:style-name="T19">по лабораторной работе №5</text:span></text:p>
      <text:p text:style-name="P20"><text:span text:style-name="T21">по курсу «Операционные системы»</text:span></text:p>
      <text:p text:style-name="P22"><text:span text:style-name="T23">на тему «Управление процессами»</text:span></text:p>
      <text:p text:style-name="P24"/>
      <text:p text:style-name="P25"/>
      <text:p text:style-name="P26"/>
      <text:p text:style-name="P27"><text:tab/><text:tab/><text:tab/><text:span text:style-name="T28">Выполнили:</text:span></text:p>
      <text:p text:style-name="P29"><text:span text:style-name="T30">Студенты группы 23ВП2</text:span></text:p>
      <text:p text:style-name="P31"><text:span text:style-name="T32">Осин С.М.</text:span></text:p>
      <text:p text:style-name="P33"><text:span text:style-name="T34">Петровский В.П.</text:span></text:p>
      <text:p text:style-name="P35"><text:span text:style-name="T36">Ермаков С.Е.</text:span></text:p>
      <text:p text:style-name="P37"><text:tab/><text:tab/><text:tab/><text:tab/><text:span text:style-name="T38">Принял</text:span><text:span text:style-name="T39">и</text:span><text:span text:style-name="T40">:</text:span></text:p>
      <text:p text:style-name="P41"><text:span text:style-name="T42">к.т.н</text:span><text:span text:style-name="T43">, п</text:span><text:span text:style-name="T44">рофессор</text:span><text:span text:style-name="T45"><text:s/>Шашков Б.Д.</text:span></text:p>
      <text:p text:style-name="P46"><text:span text:style-name="T47">старший преподаватель Дзюба Е.А.</text:span></text:p>
      <text:p text:style-name="P48"/>
      <text:p text:style-name="P49"/>
      <text:p text:style-name="P50"/>
      <text:p text:style-name="P51"/>
      <text:p text:style-name="P52"><text:span text:style-name="T53">Пенза 2025</text:span></text:p>
      <text:p text:style-name="P54"/>
      <text:p text:style-name="P55"><text:span text:style-name="T56">Цель работы</text:span></text:p>
      <text:p text:style-name="P57"><text:span text:style-name="T58">Ознакомится с некоторыми командами для управления процессами в операционной системе Linux.</text:span></text:p>
      <text:p text:style-name="P59"><text:span text:style-name="T60">Лабораторное задание</text:span></text:p>
      <text:list text:style-name="numList_1">
        <text:list-item text:start-value="1">
          <text:p text:style-name="P61"><text:span text:style-name="T62">Выполнить команду <text:s/>ps с различными ключами. Проанализировать результаты. Отразить результаты в отчете по работе.</text:span></text:p>
        </text:list-item>
        <text:list-item>
          <text:p text:style-name="P63"><text:span text:style-name="T64">Выполнить команду who с различными ключами. Проанализировать результаты. Отразить результаты в отчете по работе.</text:span></text:p>
        </text:list-item>
        <text:list-item>
          <text:p text:style-name="P65"><text:span text:style-name="T66">Открыть окно второго терминала. Запустить любую программу. Возвратиться на первый терминал и завершить работу программы на втором терминале по команде kill -9 &lt;идентификатор процесса&gt;. Проверить результат завершения на втором терминале и по команде ps.</text:span></text:p>
        </text:list-item>
      </text:list>
      <text:p text:style-name="P67"><text:span text:style-name="T68">Ход работы</text:span></text:p>
      <text:p text:style-name="P69"><text:span text:style-name="T70">Команда ps в Linux отображает информацию о запущенных процессах. Это одна из ключевых команд для мониторинга процессов в системе. Рассмотрим некоторые ключи данной команды и проанализируем их.</text:span></text:p>
      <text:p text:style-name="P71"><text:span text:style-name="T72">Если написать ps без ключей, то в терминале выведется информация о всех процессах текущего пользователя, связанный с текущим терминалом. Результат представлен на рисунке 1.</text:span></text:p>
      <text:p text:style-name="P73"><draw:frame draw:style-name="a0" draw:name="Picture 1935900691" text:anchor-type="as-char" svg:x="0in" svg:y="0in" svg:width="4.82232in" svg:height="1.23943in" style:rel-width="scale" style:rel-height="scale"><draw:image xlink:href="media/image1.png" xlink:type="simple" xlink:show="embed" xlink:actuate="onLoad"/><svg:title/><svg:desc/></draw:frame></text:p>
      <text:p text:style-name="P74"><text:span text:style-name="T75">Рисунок 1 – Результат команды ps без ключей.</text:span></text:p>
      <text:p text:style-name="P76"><text:span text:style-name="T77">Ключ -a показывает все процессы, запущенные в текущем терминале, а также процессы других пользователей, связанные с терминалами.</text:span><text:line-break/><text:span text:style-name="T78">Обычно вывод включает процессы, принадлежащие другим пользователям, которые имеют связанные с ними терминалы. Результат представлен на рисунке 2.</text:span></text:p>
      <text:soft-page-break/>
      <text:p text:style-name="P79"><draw:frame draw:style-name="a1" draw:name="Picture 726644031" text:anchor-type="as-char" svg:x="0in" svg:y="0in" svg:width="4.99938in" svg:height="1.22901in" style:rel-width="scale" style:rel-height="scale"><draw:image xlink:href="media/image2.png" xlink:type="simple" xlink:show="embed" xlink:actuate="onLoad"/><svg:title/><svg:desc/></draw:frame></text:p>
      <text:p text:style-name="P80"><text:span text:style-name="T81">Рисунок 2 – Ps с ключом -a.</text:span></text:p>
      <text:p text:style-name="P82"><text:span text:style-name="T83">Ключ -u без указания имени пользователя показывает все процессы, принадлежащие текущему пользователю, под которым запущена команда. Она выводит список процессов, запущенных этим пользователем, и помогает отслеживать их активность и управлять ими. Результат представлен на рисунке 3.</text:span></text:p>
      <text:p text:style-name="P84"><draw:frame draw:style-name="a2" draw:name="Picture 1072636533" text:anchor-type="as-char" svg:x="0in" svg:y="0in" svg:width="4.9375in" svg:height="1.34375in" style:rel-width="scale" style:rel-height="scale"><draw:image xlink:href="media/image3.png" xlink:type="simple" xlink:show="embed" xlink:actuate="onLoad"/><svg:title/><svg:desc/></draw:frame></text:p>
      <text:p text:style-name="P85"><text:span text:style-name="T86">Рисунок 3 – Ps с ключом -u.</text:span></text:p>
      <text:p text:style-name="P87"><text:span text:style-name="T88">Ключ -aux отображает подробный список всех запущенных процессов в системе, независимо от пользователя и терминала. В выводе содержится информация о каждом процессе, такая как его идентификатор, использование ресурсов (CPU и память), время работы и команда, запустившая процесс. Это полезный инструмент для мониторинга системы и обнаружения нагрузки или нежелательных процессов. Результат представлен на рисунке 4.</text:span></text:p>
      <text:p text:style-name="P89"><draw:frame draw:style-name="a3" draw:name="Picture 57801692" text:anchor-type="as-char" svg:x="0in" svg:y="0in" svg:width="5.8125in" svg:height="2.64583in" style:rel-width="scale" style:rel-height="scale"><draw:image xlink:href="media/image4.png" xlink:type="simple" xlink:show="embed" xlink:actuate="onLoad"/><svg:title/><svg:desc/></draw:frame></text:p>
      <text:p text:style-name="P90"><text:span text:style-name="T91">Рисунок 4 – Ps с ключом aux</text:span></text:p>
      <text:soft-page-break/>
      <text:p text:style-name="P92"><text:span text:style-name="T93">Команда ps -l отображает расширенную таблицу процессов в длинном <text:s/>формате, где выводится более подробная информация о каждом процессе, такая как приоритет, состояние, родительский процесс и другие характеристики. Результат выполнения представлен на рисунке 5.</text:span></text:p>
      <text:p text:style-name="P94"><draw:frame draw:style-name="a4" draw:name="Picture 1317787715" text:anchor-type="as-char" svg:x="0in" svg:y="0in" svg:width="5.45833in" svg:height="0.96875in" style:rel-width="scale" style:rel-height="scale"><draw:image xlink:href="media/image5.png" xlink:type="simple" xlink:show="embed" xlink:actuate="onLoad"/><svg:title/><svg:desc/></draw:frame></text:p>
      <text:p text:style-name="P95"><text:span text:style-name="T96">Рисунок 5 – Ps с ключом -l.</text:span></text:p>
      <text:p text:style-name="P97"/>
      <text:p text:style-name="P98"><text:span text:style-name="T99">Команда ps -x выводит список всех процессов текущего пользователя, а также системных процессов и демонов, которые не привязаны к какому-либо терминалу, показывая более полный и разносторонний обзор запущенных в системе процессов. Результат представлен на рисунке 6.</text:span></text:p>
      <text:p text:style-name="P100"><draw:frame draw:style-name="a5" draw:name="Picture 389283407" text:anchor-type="as-char" svg:x="0in" svg:y="0in" svg:width="6.6875in" svg:height="3.13542in" style:rel-width="scale" style:rel-height="scale"><draw:image xlink:href="media/image6.png" xlink:type="simple" xlink:show="embed" xlink:actuate="onLoad"/><svg:title/><svg:desc/></draw:frame></text:p>
      <text:p text:style-name="P101"><text:span text:style-name="T102">Рисунок 6 – Ps с ключом -x.</text:span></text:p>
      <text:p text:style-name="P103"><text:span text:style-name="T104">Команда who в Ubuntu показывает список пользователей, которые в данный момент вошли в систему, отображая их имена, терминалы и время начала сеансов, что позволяет быстро узнать, кто активен на компьютере или сервере.</text:span></text:p>
      <text:p text:style-name="P105"><text:span text:style-name="T106">Команда who без ключей выводит список текущих пользователей, вошедших в систему, и отображает информацию о них, такую как имя<text:s/></text:span><text:soft-page-break/><text:span text:style-name="T107">пользователя, терминал, с которого они вошли, и время входа, позволяя быстро определить, кто сейчас активно работает на системе. Результат представлен на рисунке 7.</text:span></text:p>
      <text:p text:style-name="P108"><draw:frame draw:style-name="a6" draw:name="Picture 1765979788" text:anchor-type="as-char" svg:x="0in" svg:y="0in" svg:width="5.14519in" svg:height="1.02071in" style:rel-width="scale" style:rel-height="scale"><draw:image xlink:href="media/image7.png" xlink:type="simple" xlink:show="embed" xlink:actuate="onLoad"/><svg:title/><svg:desc/></draw:frame></text:p>
      <text:p text:style-name="P109"><text:span text:style-name="T110">Рисунок 7 – who без ключей.</text:span></text:p>
      <text:p text:style-name="P111"><text:span text:style-name="T112">Команда who -a <text:s/>показывает расширенную информацию обо всех текущих процессах входа и системе в целом. Помимо списка пользователей, вошедших в систему, она выводит дополнительные данные, такие как процессы запуска системы, время работы, информацию об очередях сообщений, активность терминалов и другие системные сведения, предоставляя более полный обзор текущего состояния системы. Результат представлен на рисунке 8.</text:span></text:p>
      <text:p text:style-name="P113"><draw:frame draw:style-name="a7" draw:name="Picture 861101980" text:anchor-type="as-char" svg:x="0in" svg:y="0in" svg:width="6.09375in" svg:height="0.96875in" style:rel-width="scale" style:rel-height="scale"><draw:image xlink:href="media/image8.png" xlink:type="simple" xlink:show="embed" xlink:actuate="onLoad"/><svg:title/><svg:desc/></draw:frame></text:p>
      <text:p text:style-name="P114"><text:span text:style-name="T115">Рисунок 8 – who с ключом -a.</text:span></text:p>
      <text:p text:style-name="P116"><text:span text:style-name="T117">Команда who -b отображает сведения о времени последней загрузки системы, то есть показывает, когда система была последним разу запущена или перезагружена. Это полезно для определения даты и времени последнего запуска или перезагрузки системы. Результат представлен на рисунке 9.</text:span></text:p>
      <text:p text:style-name="P118"><draw:frame draw:style-name="a8" draw:name="Picture 1166137296" text:anchor-type="as-char" svg:x="0in" svg:y="0in" svg:width="5.00979in" svg:height="0.82281in" style:rel-width="scale" style:rel-height="scale"><draw:image xlink:href="media/image9.png" xlink:type="simple" xlink:show="embed" xlink:actuate="onLoad"/><svg:title/><svg:desc/></draw:frame></text:p>
      <text:p text:style-name="P119"><text:span text:style-name="T120">Рисунок 9 – who с ключом -b.</text:span></text:p>
      <text:p text:style-name="P121"><text:span text:style-name="T122">Команда who -q в Ubuntu выводит краткий список пользователей, которые в данный момент вошли в систему, а также количество таких пользователей. В результате она показывает имена вошедших пользователей в один столбец и под ними число, обозначающее общее количество активных входов. Результат представлен на рисунке 10.</text:span></text:p>
      <text:soft-page-break/>
      <text:p text:style-name="P123"><draw:frame draw:style-name="a9" draw:name="Picture 465455382" text:anchor-type="as-char" svg:x="0in" svg:y="0in" svg:width="5.33267in" svg:height="1.13527in" style:rel-width="scale" style:rel-height="scale"><draw:image xlink:href="media/image10.png" xlink:type="simple" xlink:show="embed" xlink:actuate="onLoad"/><svg:title/><svg:desc/></draw:frame></text:p>
      <text:p text:style-name="P124"><text:span text:style-name="T125">Рисунок 10 – who с ключом -q.</text:span></text:p>
      <text:p text:style-name="P126"><text:span text:style-name="T127">Команда who -u в Ubuntu показывает список пользователей, которые в данный момент вошли в систему, вместе с информацией о времени их входа и периодом бездействия (время простаивания терминала), а также отображает идентификаторы запущенных сессий (PID), что помогает понять активность каждого пользователя в системе. Результат представлен на рисунке 11.</text:span></text:p>
      <text:p text:style-name="P128"><draw:frame draw:style-name="a10" draw:name="Picture 2018984699" text:anchor-type="as-char" svg:x="0in" svg:y="0in" svg:width="6.01041in" svg:height="1.95833in" style:rel-width="scale" style:rel-height="scale"><draw:image xlink:href="media/image11.png" xlink:type="simple" xlink:show="embed" xlink:actuate="onLoad"/><svg:title/><svg:desc/></draw:frame></text:p>
      <text:p text:style-name="P129"><text:span text:style-name="T130">Рисунок 11 – who с ключом -u.</text:span></text:p>
      <text:p text:style-name="P131"><text:span text:style-name="T132">Откроем второй терминал, в котором запустим текстовый редактор gedit. Затем в первом терминале узнаем PID (process ID) командой ps -a. И командой kill -9 &lt;PID процесса&gt; завершим работу gedit, запущенного во втором терминале. Результаты работы представлены на рисунках 12 - 13.</text:span></text:p>
      <text:p text:style-name="P133"><draw:frame draw:style-name="a11" draw:name="Picture 754485774" text:anchor-type="as-char" svg:x="0in" svg:y="0in" svg:width="5.92708in" svg:height="2.80208in" style:rel-width="scale" style:rel-height="scale"><draw:image xlink:href="media/image12.png" xlink:type="simple" xlink:show="embed" xlink:actuate="onLoad"/><svg:title/><svg:desc/></draw:frame></text:p>
      <text:soft-page-break/>
      <text:p text:style-name="P134"><text:span text:style-name="T135">Рисунок 12 – Запуск gedit во втором терминале.</text:span></text:p>
      <text:p text:style-name="P136"><draw:frame draw:style-name="a12" draw:name="Picture 2067736285" text:anchor-type="as-char" svg:x="0in" svg:y="0in" svg:width="5.83333in" svg:height="2.90625in" style:rel-width="scale" style:rel-height="scale"><draw:image xlink:href="media/image13.png" xlink:type="simple" xlink:show="embed" xlink:actuate="onLoad"/><svg:title/><svg:desc/></draw:frame></text:p>
      <text:p text:style-name="P137"><text:span text:style-name="T138">Рисунок 13 – Завершение работы процесса gedit командой kill.</text:span></text:p>
      <text:p text:style-name="P139"/>
      <text:p text:style-name="P140"><text:span text:style-name="T141">Вывод</text:span></text:p>
      <text:p text:style-name="P142"><text:span text:style-name="T143">В ходе выполнения лабораторной работы изучили особенности некоторых команд для управления процессами в ОС Linu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XO Thames" svg:font-family="XO Tha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ystem" svg:panose-1="2 11 6 4 2 2 2 2 2 4"/>
    <style:font-face style:name="PT Astra Serif" svg:font-family="PT Astra 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Label4" style:display-name="ListLabel 4" style:family="paragraph">
      <style:text-properties fo:hyphenate="false"/>
    </style:style>
    <style:style style:name="ListLabel3" style:display-name="ListLabel 3" style:family="paragraph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1" style:display-name="ListLabel 1" style:family="paragraph"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ListLabel15" style:display-name="ListLabel 15" style:family="paragraph">
      <style:text-properties fo:hyphenate="false"/>
    </style:style>
    <style:style style:name="ListLabel16" style:display-name="ListLabel 16" style:family="paragraph">
      <style:text-properties fo:hyphenate="false"/>
    </style:style>
    <style:style style:name="НижнийколонтитулЗнак" style:display-name="Нижний колонтитул Знак" style:family="paragraph" style:parent-style-name="DefaultParagraphFont1"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7" style:display-name="ListLabel 7" style:family="paragraph">
      <style:text-properties fo:hyphenate="false"/>
    </style:style>
    <style:style style:name="ВерхнийколонтитулЗнак" style:display-name="Верхний колонтитул Знак" style:family="paragraph" style:parent-style-name="DefaultParagraphFont1">
      <style:text-properties fo:hyphenate="false"/>
    </style:style>
    <style:style style:name="ListLabel17" style:display-name="ListLabel 17" style:family="paragraph">
      <style:text-properties fo:hyphenate="false"/>
    </style:style>
    <style:style style:name="ListLabel6" style:display-name="ListLabel 6" style:family="paragraph">
      <style:text-properties fo:hyphenate="false"/>
    </style:style>
    <style:style style:name="ListLabel2" style:display-name="ListLabel 2" style:family="paragraph"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КодЗнак" style:display-name="Код Знак" style:family="paragraph" style:parent-style-name="DefaultParagraphFont1">
      <style:text-properties style:font-name="Courier New" style:font-name-asian="Courier New" style:font-name-complex="Courier New" fo:font-weight="bold" style:font-weight-asian="bold" style:font-weight-complex="bold" fo:hyphenate="false"/>
    </style:style>
    <style:style style:name="ListLabel9" style:display-name="ListLabel 9" style:family="paragraph">
      <style:text-properties fo:hyphenate="false"/>
    </style:style>
    <style:style style:name="ListLabel18" style:display-name="ListLabel 18" style:family="paragraph">
      <style:text-properties fo:hyphenate="false"/>
    </style:style>
    <style:style style:name="ListLabel12" style:display-name="ListLabel 12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ListLabel10" style:display-name="ListLabel 10" style:family="paragraph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ListLabel13" style:display-name="ListLabel 13" style:family="paragraph">
      <style:text-properties fo:hyphenate="false"/>
    </style:style>
    <style:style style:name="Contents1" style:display-name="Contents 1" style:family="paragraph" style:parent-style-name="Standard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ListLabel11" style:display-name="ListLabel 11" style:family="paragraph">
      <style:text-properties fo:hyphenate="false"/>
    </style:style>
    <style:style style:name="Текстотчета" style:display-name="Текст отчета" style:family="paragraph" style:parent-style-name="Standard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DefaultParagraphFont1" style:display-name="Default Paragraph Font1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ListLabel14" style:display-name="ListLabel 14" style:family="paragraph">
      <style:text-properties fo:hyphenate="false"/>
    </style:style>
    <style:style style:name="Subtitle" style:display-name="Subtitle" style:family="paragraph" style:parent-style-name="Standard" style:next-style-name="Standard">
      <style:paragraph-properties fo:text-align="justify"/>
      <style:text-properties style:font-name="XO Thames" style:font-name-asian="XO Thames" style:font-name-complex="XO Thame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margin-top="0.3937in" fo:margin-bottom="0.3937in"/>
      <style:text-properties style:font-name="XO Thames" style:font-name-asian="XO Thames" style:font-name-complex="XO Thames" fo:font-weight="bold" style:font-weight-asian="bold" style:font-weight-complex="bold" fo:text-transform="uppercase" fo:font-size="20pt" style:font-size-asian="20pt" style:font-size-complex="20pt" fo:hyphenate="false"/>
    </style:style>
    <style:style style:name="ListLabel8" style:display-name="ListLabel 8" style:family="paragraph">
      <style:text-properties fo:hyphenate="false"/>
    </style:style>
    <style:style style:name="Код" style:display-name="Код" style:family="paragraph" style:parent-style-name="Standard">
      <style:paragraph-properties fo:text-align="justify" fo:margin-bottom="0in" fo:line-height="150%" fo:text-indent="0.4923in"/>
      <style:text-properties style:font-name="Courier New" style:font-name-asian="Courier New" style:font-name-complex="Courier New" fo:font-weight="bold" style:font-weight-asian="bold" style:font-weight-complex="bold" fo:hyphenate="false"/>
    </style:style>
    <style:style style:name="ListLabel5" style:display-name="ListLabel 5" style:family="paragraph">
      <style:text-properties fo:hyphenate="false"/>
    </style:style>
    <style:style style:name="ТекстотчетаЗнак" style:display-name="Текст отчета Знак" style:family="paragraph" style:parent-style-name="DefaultParagraphFont1">
      <style:text-properties style:font-name="Times New Roman" style:font-name-asian="Times New Roman" style:font-name-complex="Times New Roman" fo:font-size="14pt" style:font-size-asian="14pt" style:font-size-complex="14pt" fo:hyphenate="false"/>
    </style:style>
    <text:list-style style:name="numList_1" style:display-name="num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Normal"><text:line-break/></text:p>
      </style:header>
      <style:footer>
        <text:p text:style-name="P2"><text:page-number text:fixed="false">1</text:page-number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ega Osin</dc:creator>
    <meta:creation-date>2026-05-09T15:20:00Z</meta:creation-date>
    <dc:date>2026-05-09T15:22:00Z</dc:date>
    <meta:template xlink:href="Normal.dotm" xlink:type="simple"/>
    <meta:editing-cycles>2</meta:editing-cycles>
    <meta:editing-duration>PT120S</meta:editing-duration>
    <meta:document-statistic meta:page-count="7" meta:paragraph-count="11" meta:word-count="841" meta:character-count="5629" meta:row-count="39" meta:non-whitespace-character-count="4799"/>
  </office:meta>
</office:document-meta>
</file>